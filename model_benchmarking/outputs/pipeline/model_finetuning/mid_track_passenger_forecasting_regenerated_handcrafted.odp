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19">
      <style:text-properties fo:language="en" fo:country="US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3">
      <style:drawing-page-properties draw:fill="solid" draw:fill-color="#f5f7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0.25347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0.25347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0.25347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0">
      <style:paragraph-properties fo:text-align="center"/>
    </style:style>
    <style:style style:family="table-cell" style:name="a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23">
      <style:graphic-properties draw:fill="none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solid" draw:fill-color="#67b8d6" draw:opacity="100%" draw:stroke="solid" svg:stroke-width="0.01389in" svg:stroke-color="#67b8d6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80">
      <style:table-properties style:writing-mode="lr-tb"/>
    </style:style>
    <style:style style:family="table-column" style:name="a881">
      <style:table-column-properties style:column-width="2.84396in"/>
    </style:style>
    <style:style style:family="table-column" style:name="a882">
      <style:table-column-properties style:column-width="2.84396in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83">
      <style:table-row-properties style:row-height="0.63312in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de9f8" svg:stroke-opacity="88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size="0.27778in" style:font-size-asian="0.27778in" style:font-size-complex="0.27778in" fo:language="en" fo:country="US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5">
      <style:paragraph-properties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5">
      <style:text-properties fo:font-variant="normal" fo:text-transform="none" fo:color="#afc5e3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size="0.27778in" style:font-size-asian="0.27778in" style:font-size-complex="0.27778in" fo:language="en" fo:country="US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solid" draw:fill-color="#f5f7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draw:fill="none" draw:stroke="non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solid" draw:fill-color="#67b8d6" draw:opacity="100%" draw:stroke="solid" svg:stroke-width="0.01389in" svg:stroke-color="#67b8d6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9">
      <style:drawing-page-properties draw:fill="solid" draw:fill-color="#f5f7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67">
      <style:table-properties style:writing-mode="lr-tb"/>
    </style:style>
    <style:style style:family="table-column" style:name="a768">
      <style:table-column-properties style:column-width="5.33259in"/>
    </style:style>
    <style:style style:family="table-column" style:name="a769">
      <style:table-column-properties style:column-width="5.33259in"/>
    </style:style>
    <style:style style:family="table-cell" style:name="a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2">
      <style:table-row-properties style:row-height="0.63312in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size="0.27778in" style:font-size-asian="0.27778in" style:font-size-complex="0.27778in" fo:language="en" fo:country="US"/>
    </style:style>
    <style:style style:family="graphic" style:name="a5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size="0.27778in" style:font-size-asian="0.27778in" style:font-size-complex="0.27778in" fo:language="en" fo:country="US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5e7188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667in" svg:stroke-color="#cad4e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770">
      <style:table-row-properties style:row-height="0.63312in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size="0.27778in" style:font-size-asian="0.27778in" style:font-size-complex="0.27778in" fo:language="en" fo:country="US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/>
    </style:style>
    <style:style style:family="graphic" style:name="a10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size="0.27778in" style:font-size-asian="0.27778in" style:font-size-complex="0.27778in" fo:language="en" fo:country="US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solid" draw:fill-color="#67b8d6" draw:opacity="100%" draw:stroke="solid" svg:stroke-width="0.01389in" svg:stroke-color="#67b8d6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6">
      <style:paragraph-properties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79">
      <style:table-row-properties style:row-height="0.63312in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graphic" style:name="a522" style:parent-style-name="Graphics">
      <style:graphic-properties draw:fill="none" fo:clip="rect(0in, -0.08235in, -0.02322in, 0in)" draw:stroke="non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size="0.27778in" style:font-size-asian="0.27778in" style:font-size-complex="0.27778in" fo:language="en" fo:country="US"/>
    </style:style>
    <style:style style:family="paragraph" style:name="a781">
      <style:paragraph-properties/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4">
      <style:text-properties fo:font-size="0.27778in" style:font-size-asian="0.27778in" style:font-size-complex="0.27778in" fo:language="en" fo:country="US"/>
    </style:style>
    <style:style style:family="paragraph" style:name="a785">
      <style:paragraph-properties/>
    </style:style>
    <style:style style:family="table-cell" style:name="a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8">
      <style:table-row-properties style:row-height="0.63312in"/>
    </style:style>
    <style:style style:family="text" style:name="a789">
      <style:text-properties fo:font-size="0.27778in" style:font-size-asian="0.27778in" style:font-size-complex="0.27778in" fo:language="en" fo:country="US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solid" draw:fill-color="#f5f7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7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/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3">
      <style:text-properties fo:font-size="0.27778in" style:font-size-asian="0.27778in" style:font-size-complex="0.27778in" fo:language="en" fo:country="US"/>
    </style:style>
    <style:style style:family="paragraph" style:name="a794">
      <style:paragraph-properties/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97">
      <style:table-row-properties style:row-height="0.63312in"/>
    </style:style>
    <style:style style:family="text" style:name="a798">
      <style:text-properties fo:font-size="0.27778in" style:font-size-asian="0.27778in" style:font-size-complex="0.27778in" fo:language="en" fo:country="US"/>
    </style:style>
    <style:style style:family="paragraph" style:name="a799">
      <style:paragraph-properties/>
    </style:style>
    <style:style style:family="graphic" style:name="a5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solid" draw:fill-color="#67b8d6" draw:opacity="100%" draw:stroke="solid" svg:stroke-width="0.01389in" svg:stroke-color="#67b8d6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548">
      <style:table-properties style:writing-mode="lr-tb"/>
    </style:style>
    <style:style style:family="table-column" style:name="a549">
      <style:table-column-properties style:column-width="4.94629in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50">
      <style:table-column-properties style:column-width="4.94629in"/>
    </style:style>
    <style:style style:family="table-row" style:name="a551">
      <style:table-row-properties style:row-height="0.47297in"/>
    </style:style>
    <style:style style:family="text" style:name="a552">
      <style:text-properties fo:language="en" fo:country="US"/>
    </style:style>
    <style:style style:family="paragraph" style:name="a553">
      <style:paragraph-properties fo:text-align="center"/>
    </style:style>
    <style:style style:family="table-cell" style:name="a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6">
      <style:text-properties fo:language="en" fo:country="US"/>
    </style:style>
    <style:style style:family="paragraph" style:name="a557">
      <style:paragraph-properties fo:text-align="center"/>
    </style:style>
    <style:style style:family="table-cell" style:name="a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9">
      <style:graphic-properties draw:fill="none" draw:stroke="none"/>
    </style:style>
    <style:style style:family="table-row" style:name="a560">
      <style:table-row-properties style:row-height="0.47297in"/>
    </style:style>
    <style:style style:family="text" style:name="a561">
      <style:text-properties fo:language="en" fo:country="US"/>
    </style:style>
    <style:style style:family="paragraph" style:name="a562">
      <style:paragraph-properties fo:text-align="center"/>
    </style:style>
    <style:style style:family="table-cell" style:name="a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5">
      <style:text-properties fo:language="en" fo:country="US"/>
    </style:style>
    <style:style style:family="paragraph" style:name="a566">
      <style:paragraph-properties fo:text-align="center"/>
    </style:style>
    <style:style style:family="table-cell" style:name="a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9">
      <style:table-row-properties style:row-height="0.47297in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5f7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0">
      <style:text-properties fo:language="en" fo:country="US"/>
    </style:style>
    <style:style style:family="paragraph" style:name="a571">
      <style:paragraph-properties fo:text-align="center"/>
    </style:style>
    <style:style style:family="table-cell" style:name="a9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01">
      <style:table-row-properties style:row-height="0.63312in"/>
    </style:style>
    <style:style style:family="text" style:name="a574">
      <style:text-properties fo:language="en" fo:country="US"/>
    </style:style>
    <style:style style:family="text" style:name="a902">
      <style:text-properties fo:font-size="0.27778in" style:font-size-asian="0.27778in" style:font-size-complex="0.27778in" fo:language="en" fo:country="US"/>
    </style:style>
    <style:style style:family="paragraph" style:name="a575">
      <style:paragraph-properties fo:text-align="center"/>
    </style:style>
    <style:style style:family="paragraph" style:name="a903">
      <style:paragraph-properties/>
    </style:style>
    <style:style style:family="table-cell" style:name="a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78">
      <style:table-row-properties style:row-height="0.47297in"/>
    </style:style>
    <style:style style:family="text" style:name="a906">
      <style:text-properties fo:font-size="0.27778in" style:font-size-asian="0.27778in" style:font-size-complex="0.27778in" fo:language="en" fo:country="US"/>
    </style:style>
    <style:style style:family="text" style:name="a579">
      <style:text-properties fo:language="en" fo:country="US"/>
    </style:style>
    <style:style style:family="paragraph" style:name="a907">
      <style:paragraph-properties/>
    </style:style>
    <style:style style:family="table-cell" style:name="a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909">
      <style:table-properties style:writing-mode="lr-tb"/>
    </style:style>
    <style:style style:family="text" style:name="a1100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8" style:parent-style-name="Graphics">
      <style:graphic-properties draw:fill="none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text-align="center"/>
    </style:style>
    <style:style style:family="table-cell" style:name="a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910">
      <style:table-column-properties style:column-width="2.84396in"/>
    </style:style>
    <style:style style:family="text" style:name="a583">
      <style:text-properties fo:language="en" fo:country="US"/>
    </style:style>
    <style:style style:family="table-column" style:name="a911">
      <style:table-column-properties style:column-width="2.84396in"/>
    </style:style>
    <style:style style:family="paragraph" style:name="a584">
      <style:paragraph-properties fo:text-align="center"/>
    </style:style>
    <style:style style:family="table-row" style:name="a912">
      <style:table-row-properties style:row-height="0.63312in"/>
    </style:style>
    <style:style style:family="text" style:name="a913">
      <style:text-properties fo:font-size="0.27778in" style:font-size-asian="0.27778in" style:font-size-complex="0.27778in" fo:language="en" fo:country="US"/>
    </style:style>
    <style:style style:family="table-cell" style:name="a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4">
      <style:paragraph-properties/>
    </style:style>
    <style:style style:family="table-row" style:name="a587">
      <style:table-row-properties style:row-height="0.80404in"/>
    </style:style>
    <style:style style:family="table-cell" style:name="a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8">
      <style:text-properties fo:language="en" fo:country="US"/>
    </style:style>
    <style:style style:family="text" style:name="a916">
      <style:text-properties fo:font-size="0.27778in" style:font-size-asian="0.27778in" style:font-size-complex="0.27778in" fo:language="en" fo:country="US"/>
    </style:style>
    <style:style style:family="paragraph" style:name="a589">
      <style:paragraph-properties fo:text-align="center"/>
    </style:style>
    <style:style style:family="paragraph" style:name="a917">
      <style:paragraph-properties/>
    </style:style>
    <style:style style:family="table-cell" style:name="a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2">
      <style:text-properties fo:language="en" fo:country="US"/>
    </style:style>
    <style:style style:family="table-row" style:name="a920">
      <style:table-row-properties style:row-height="0.63312in"/>
    </style:style>
    <style:style style:family="paragraph" style:name="a593">
      <style:paragraph-properties fo:text-align="center"/>
    </style:style>
    <style:style style:family="text" style:name="a921">
      <style:text-properties fo:font-size="0.27778in" style:font-size-asian="0.27778in" style:font-size-complex="0.27778in" fo:language="en" fo:country="US"/>
    </style:style>
    <style:style style:family="paragraph" style:name="a922">
      <style:paragraph-properties/>
    </style:style>
    <style:style style:family="table-cell" style:name="a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96">
      <style:table-row-properties style:row-height="0.47297in"/>
    </style:style>
    <style:style style:family="table-cell" style:name="a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7">
      <style:text-properties fo:language="en" fo:country="US"/>
    </style:style>
    <style:style style:family="text" style:name="a925">
      <style:text-properties fo:font-size="0.27778in" style:font-size-asian="0.27778in" style:font-size-complex="0.27778in" fo:language="en" fo:country="US"/>
    </style:style>
    <style:style style:family="paragraph" style:name="a598">
      <style:paragraph-properties fo:text-align="center"/>
    </style:style>
    <style:style style:family="paragraph" style:name="a926">
      <style:paragraph-properties/>
    </style:style>
    <style:style style:family="table-cell" style:name="a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9">
      <style:table-row-properties style:row-height="0.63312in"/>
    </style:style>
    <style:style style:family="paragraph" style:name="a11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222in" svg:stroke-color="#9bbce4" svg:stroke-opacity="8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size="0.27778in" style:font-size-asian="0.27778in" style:font-size-complex="0.27778in" fo:language="en" fo:country="US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de9f8" svg:stroke-opacity="88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de9f8" svg:stroke-opacity="88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none" draw:stroke="none"/>
    </style:style>
    <style:style style:family="presentation" style:name="a1129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size="0.27778in" style:font-size-asian="0.27778in" style:font-size-complex="0.27778in" fo:language="en" fo:country="US"/>
    </style:style>
    <style:style style:family="paragraph" style:name="a931">
      <style:paragraph-properties/>
    </style:style>
    <style:style style:family="table-cell" style:name="a9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4">
      <style:text-properties fo:font-size="0.27778in" style:font-size-asian="0.27778in" style:font-size-complex="0.27778in" fo:language="en" fo:country="US"/>
    </style:style>
    <style:style style:family="paragraph" style:name="a935">
      <style:paragraph-properties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37">
      <style:graphic-properties draw:fill="none" draw:stroke="non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2">
      <style:table-row-properties style:row-height="0.51686in"/>
    </style:style>
    <style:style style:family="text" style:name="a1003">
      <style:text-properties fo:language="en" fo:country="US"/>
    </style:style>
    <style:style style:family="paragraph" style:name="a1004">
      <style:paragraph-properties fo:text-align="center"/>
    </style:style>
    <style:style style:family="table-cell" style:name="a1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7">
      <style:text-properties fo:language="en" fo:country="US"/>
    </style:style>
    <style:style style:family="paragraph" style:name="a1008">
      <style:paragraph-properties fo:text-align="center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de9f8" svg:stroke-opacity="88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de9f8" svg:stroke-opacity="88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5f7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de9f8" svg:stroke-opacity="88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de9f8" svg:stroke-opacity="88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5">
      <style:drawing-page-properties draw:fill="solid" draw:fill-color="#f5f7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7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1">
      <style:text-properties fo:language="en" fo:country="US"/>
    </style:style>
    <style:style style:family="paragraph" style:name="a1012">
      <style:paragraph-properties fo:text-align="center"/>
    </style:style>
    <style:style style:family="table-cell" style:name="a1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5">
      <style:table-row-properties style:row-height="0.51686in"/>
    </style:style>
    <style:style style:family="text" style:name="a1016">
      <style:text-properties fo:language="en" fo:country="US"/>
    </style:style>
    <style:style style:family="paragraph" style:name="a1017">
      <style:paragraph-properties fo:text-align="center"/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de9f8" svg:stroke-opacity="88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solid" draw:fill-color="#67b8d6" draw:opacity="100%" draw:stroke="solid" svg:stroke-width="0.01389in" svg:stroke-color="#67b8d6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de9f8" svg:stroke-opacity="88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afc5e3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de9f8" svg:stroke-opacity="88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0.25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solid" draw:fill-color="#67b8d6" draw:opacity="100%" draw:stroke="solid" svg:stroke-width="0.01389in" svg:stroke-color="#67b8d6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959">
      <style:table-properties style:writing-mode="lr-tb"/>
    </style:style>
    <style:style style:family="text" style:name="a1020">
      <style:text-properties fo:language="en" fo:country="US"/>
    </style:style>
    <style:style style:family="paragraph" style:name="a1021">
      <style:paragraph-properties fo:text-align="center"/>
    </style:style>
    <style:style style:family="table-cell" style:name="a1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language="en" fo:country="US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text-align="center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solid" draw:fill-color="#67b8d6" draw:opacity="100%" draw:stroke="solid" svg:stroke-width="0.01389in" svg:stroke-color="#67b8d6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draw:fill="none" draw:stroke="none"/>
    </style:style>
    <style:style style:family="text" style:name="a706">
      <style:text-properties fo:font-variant="normal" fo:text-transform="none" fo:color="#5e7188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 style:parent-style-name="Graphics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 style:parent-style-name="Graphics">
      <style:graphic-properties draw:fill="none" fo:clip="rect(0in, -0.08235in, -0.02322in, 0in)" draw:stroke="none"/>
    </style:style>
    <style:style style:family="paragraph" style:name="a831">
      <style:paragraph-properties fo:line-height="0.25347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0.25347in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8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0.25347in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60">
      <style:table-column-properties style:column-width="2.52225in"/>
    </style:style>
    <style:style style:family="table-column" style:name="a961">
      <style:table-column-properties style:column-width="4.24048in"/>
    </style:style>
    <style:style style:family="table-column" style:name="a962">
      <style:table-column-properties style:column-width="3.38136in"/>
    </style:style>
    <style:style style:family="table-row" style:name="a963">
      <style:table-row-properties style:row-height="0.51686in"/>
    </style:style>
    <style:style style:family="text" style:name="a964">
      <style:text-properties fo:language="en" fo:country="US"/>
    </style:style>
    <style:style style:family="paragraph" style:name="a965">
      <style:paragraph-properties fo:text-align="center"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language="en" fo:country="US"/>
    </style:style>
    <style:style style:family="paragraph" style:name="a969">
      <style:paragraph-properties fo:text-align="center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667in" svg:stroke-color="#cad4e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6">
      <style:drawing-page-properties draw:fill="solid" draw:fill-color="#f5f7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9">
      <style:text-properties fo:font-variant="normal" fo:text-transform="none" fo:color="#163b73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0.25347in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0.25347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0.25347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0.25347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2">
      <style:text-properties fo:language="en" fo:country="US"/>
    </style:style>
    <style:style style:family="paragraph" style:name="a973">
      <style:paragraph-properties fo:text-align="center"/>
    </style:style>
    <style:style style:family="table-cell" style:name="a9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6">
      <style:table-row-properties style:row-height="0.51686in"/>
    </style:style>
    <style:style style:family="text" style:name="a977">
      <style:text-properties fo:language="en" fo:country="US"/>
    </style:style>
    <style:style style:family="paragraph" style:name="a978">
      <style:paragraph-properties fo:text-align="center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solid" draw:fill-color="#67b8d6" draw:opacity="100%" draw:stroke="solid" svg:stroke-width="0.01389in" svg:stroke-color="#67b8d6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0.25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0.25347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0.25347in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1">
      <style:text-properties fo:language="en" fo:country="US"/>
    </style:style>
    <style:style style:family="paragraph" style:name="a982">
      <style:paragraph-properties fo:text-align="center"/>
    </style:style>
    <style:style style:family="table-cell" style:name="a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1">
      <style:text-properties fo:language="en" fo:country="US"/>
    </style:style>
    <style:style style:family="table-cell" style:name="a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2">
      <style:paragraph-properties fo:text-align="center"/>
    </style:style>
    <style:style style:family="text" style:name="a985">
      <style:text-properties fo:language="en" fo:country="US"/>
    </style:style>
    <style:style style:family="paragraph" style:name="a986">
      <style:paragraph-properties fo:text-align="center"/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5">
      <style:table-row-properties style:row-height="0.47297in"/>
    </style:style>
    <style:style style:family="table-cell" style:name="a9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6">
      <style:text-properties fo:language="en" fo:country="US"/>
    </style:style>
    <style:style style:family="table-row" style:name="a989">
      <style:table-row-properties style:row-height="0.51686in"/>
    </style:style>
    <style:style style:family="paragraph" style:name="a607">
      <style:paragraph-properties fo:text-align="center"/>
    </style:style>
    <style:style style:family="graphic" style:name="a1050" style:parent-style-name="Graphics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4">
      <style:graphic-properties draw:fill="none" draw:stroke="non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0.25347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0.25347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0.25347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0.25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language="en" fo:country="US"/>
    </style:style>
    <style:style style:family="paragraph" style:name="a991">
      <style:paragraph-properties fo:text-align="center"/>
    </style:style>
    <style:style style:family="text" style:name="a610">
      <style:text-properties fo:language="en" fo:country="US"/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1">
      <style:paragraph-properties fo:text-align="center"/>
    </style:style>
    <style:style style:family="text" style:name="a994">
      <style:text-properties fo:language="en" fo:country="US"/>
    </style:style>
    <style:style style:family="paragraph" style:name="a995">
      <style:paragraph-properties fo:text-align="center"/>
    </style:style>
    <style:style style:family="table-cell" style:name="a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4">
      <style:table-row-properties style:row-height="0.80404in"/>
    </style:style>
    <style:style style:family="table-cell" style:name="a9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5">
      <style:text-properties fo:language="en" fo:country="US"/>
    </style:style>
    <style:style style:family="text" style:name="a998">
      <style:text-properties fo:language="en" fo:country="US"/>
    </style:style>
    <style:style style:family="paragraph" style:name="a616">
      <style:paragraph-properties fo:text-align="center"/>
    </style:style>
    <style:style style:family="paragraph" style:name="a999">
      <style:paragraph-properties fo:text-align="center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12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79"/>
    <text:list-style style:name="a539">
      <text:list-level-style-number text:level="1" style:num-format="1" style:num-suffix="." style:num-list-format-name="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size="100%"/>
      </text:list-level-style-number>
    </text:list-style>
    <text:list-style style:name="a886"/>
    <text:list-style style:name="a85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18"/>
    <text:list-style style:name="a1000"/>
    <text:list-style style:name="a85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91"/>
    <text:list-style style:name="a858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005"/>
    <text:list-style style:name="a572"/>
    <text:list-style style:name="a795"/>
    <text:list-style style:name="a1009"/>
    <text:list-style style:name="a983"/>
    <text:list-style style:name="a603"/>
    <text:list-style style:name="a576"/>
    <text:list-style style:name="a987"/>
    <text:list-style style:name="a608"/>
    <text:list-style style:name="a107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90"/>
    <text:list-style style:name="a895"/>
    <text:list-style style:name="a923"/>
    <text:list-style style:name="a899"/>
    <text:list-style style:name="a86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27"/>
    <text:list-style style:name="a86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13"/>
    <text:list-style style:name="a86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81"/>
    <text:list-style style:name="a1018"/>
    <text:list-style style:name="a835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612"/>
    <text:list-style style:name="a992"/>
    <text:list-style style:name="a585"/>
    <text:list-style style:name="a838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800"/>
    <text:list-style style:name="a996"/>
    <text:list-style style:name="a773"/>
    <text:list-style style:name="a617"/>
    <text:list-style style:name="a804"/>
    <text:list-style style:name="a554"/>
    <text:list-style style:name="a777"/>
    <text:list-style style:name="a966"/>
    <text:list-style style:name="a111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58"/>
    <text:list-style style:name="a932"/>
    <text:list-style style:name="a1117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22"/>
    <text:list-style style:name="a904"/>
    <text:list-style style:name="a87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90"/>
    <text:list-style style:name="a1026"/>
    <text:list-style style:name="a841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621"/>
    <text:list-style style:name="a84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94"/>
    <text:list-style style:name="a84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82"/>
    <text:list-style style:name="a599"/>
    <text:list-style style:name="a970"/>
    <text:list-style style:name="a786"/>
    <text:list-style style:name="a563"/>
    <text:list-style style:name="a974"/>
    <text:list-style style:name="a112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67"/>
  </office:automatic-styles>
  <office:body>
    <office:presentation>
      <draw:page draw:name="Slide 1" draw:style-name="a462" draw:master-page-name="Master1-Layout1-cust-DEFAULT" presentation:presentation-page-layout-name="Master1-PPL1" draw:id="Slide-256">
        <draw:custom-shape svg:x="0.00595in" svg:y="0.00595in" svg:width="7.89881in" svg:height="7.5in" draw:id="id34" draw:style-name="a465" draw:name="Rectangle 27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in" svg:y="0in" svg:width="0in" svg:height="7.5in" draw:id="id35" draw:style-name="a468" draw:name="Shape 1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63427in" svg:y="1.69906in" svg:width="3.95in" svg:height="0in" draw:id="id36" draw:style-name="a471" draw:name="Shape 8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83427in" svg:y="1.58906in" svg:width="0.16in" svg:height="0in" draw:id="id37" draw:style-name="a474" draw:name="Shape 9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9.18427in" svg:y="1.58906in" svg:width="0.16in" svg:height="0in" draw:id="id38" draw:style-name="a477" draw:name="Shape 10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9.53427in" svg:y="1.58906in" svg:width="0.16in" svg:height="0in" draw:id="id39" draw:style-name="a480" draw:name="Shape 11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9.88427in" svg:y="1.58906in" svg:width="0.16in" svg:height="0in" draw:id="id40" draw:style-name="a483" draw:name="Shape 12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23427in" svg:y="1.58906in" svg:width="0.16in" svg:height="0in" draw:id="id41" draw:style-name="a486" draw:name="Shape 13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57201in" svg:y="1.58906in" svg:width="0.16in" svg:height="0in" draw:id="id42" draw:style-name="a489" draw:name="Shape 14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93427in" svg:y="1.58906in" svg:width="0.16in" svg:height="0in" draw:id="id43" draw:style-name="a492" draw:name="Shape 15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28427in" svg:y="1.58906in" svg:width="0.16in" svg:height="0in" draw:id="id44" draw:style-name="a495" draw:name="Shape 16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63427in" svg:y="1.58906in" svg:width="0.16in" svg:height="0in" draw:id="id45" draw:style-name="a498" draw:name="Shape 17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98427in" svg:y="1.58906in" svg:width="0.16in" svg:height="0in" draw:id="id46" draw:style-name="a501" draw:name="Shape 18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8in" svg:y="1.55in" svg:width="6.25in" svg:height="1.3in" draw:id="id47" draw:style-name="a504" draw:name="Text 19">
          <svg:title/>
          <svg:desc/>
          <text:p text:style-name="a503" text:class-names="" text:cond-style-name=""><text:span text:style-name="a502" text:class-names="">STACK OVERFLOW TAG CLASSIFIC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in" svg:y="3.02in" svg:width="3.4in" svg:height="0.26in" draw:id="id48" draw:style-name="a507" draw:name="Text 20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451in" svg:y="2.74113in" svg:width="5.8in" svg:height="0.55in" draw:id="id49" draw:style-name="a511" draw:name="Text 21">
          <svg:title/>
          <svg:desc/>
          <text:p text:style-name="a510" text:class-names="" text:cond-style-name=""><text:span text:style-name="a508" text:class-names="">Machine Learning II</text:span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0" draw:style-name="a520" draw:name="TextBox 23" svg:x="8.17957in" svg:y="5.54782in" svg:width="5.10714in" svg:height="1.00977in">
          <draw:text-box>
            <text:p text:style-name="a513" text:class-names="" text:cond-style-name=""><text:span text:style-name="a512" text:class-names="">Presented by:</text:span></text:p>
            <text:p text:style-name="a516" text:class-names="" text:cond-style-name=""><text:span text:style-name="a514" text:class-names="">Sang NGUYEN</text:span><text:span text:style-name="a515" text:class-names=""/></text:p>
            <text:p text:style-name="a519" text:class-names="" text:cond-style-name=""><text:span text:style-name="a517" text:class-names="">Romain POIRRIER<text:s text:c="1"/></text:span><text:span text:style-name="a518" text:class-names=""/></text:p>
          </draw:text-box>
          <svg:title/>
          <svg:desc/>
        </draw:frame>
        <draw:frame draw:id="id51" draw:style-name="a521" draw:name="Picture 25" svg:x="10.3178in" svg:y="0.64973in" svg:width="2.86765in" svg:height="0.73698in" style:rel-width="scale" style:rel-height="scale">
          <draw:image xlink:href="media/image1.jpeg" xlink:type="simple" xlink:show="embed" xlink:actuate="onLoad"/>
          <svg:title/>
          <svg:desc>A red and black logo

AI-generated content may be incorrect.</svg:desc>
        </draw:frame>
        <draw:frame draw:id="id52" draw:style-name="a522" draw:name="Picture 26" svg:x="8.10539in" svg:y="0.27145in" svg:width="2.02555in" svg:height="1.11439in" style:rel-width="scale" style:rel-height="scale">
          <draw:image xlink:href="media/image2.png" xlink:type="simple" xlink:show="embed" xlink:actuate="onLoad"/>
          <svg:title/>
          <svg:desc>A blue text on a white background

AI-generated content may be incorrect.</svg:desc>
        </draw:frame>
        <draw:custom-shape svg:x="1.03168in" svg:y="6.79364in" svg:width="5.8in" svg:height="0.55in" draw:id="id53" draw:style-name="a526" draw:name="Text 21">
          <svg:title/>
          <svg:desc/>
          <text:p text:style-name="a525" text:class-names="" text:cond-style-name=""><text:span text:style-name="a523" text:class-names="">MASTER MINDS – INSA LYON</text:span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34">
          <draw:page-thumbnail draw:page-number="1" svg:x="0in" svg:y="0in" svg:width="0in" svg:height="0in" presentation:class="page" draw:id="id54" presentation:style-name="a527" draw:name="Slide Image Placeholder 1">
            <svg:title/>
            <svg:desc/>
          </draw:page-thumbnail>
          <draw:frame draw:id="id55" presentation:style-name="a530" draw:name="Notes Placeholder 2" svg:x="0in" svg:y="0in" svg:width="0in" svg:height="0in" presentation:class="notes" presentation:placeholder="false">
            <draw:text-box>
              <text:p text:style-name="a529" text:class-names="" text:cond-style-name=""><text:span text:style-name="a528" text:class-names="">[Sources] - Uploaded project READMEs in this chat (README.pdf and README (1).pdf). - Deck structure updated from user-specified revised table of contents in chat.</text:span></text:p>
            </draw:text-box>
            <svg:title/>
            <svg:desc/>
          </draw:frame>
          <draw:frame draw:id="id56" draw:style-name="a533" draw:name="Slide Number Placeholder 3" svg:x="0in" svg:y="0in" svg:width="0in" svg:height="0in">
            <draw:text-box>
              <text:p text:style-name="a532" text:class-names="" text:cond-style-name=""><text:span text:style-name="a5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535" draw:master-page-name="Master1-Layout2-cust-MASTER" presentation:presentation-page-layout-name="Master1-PPL2" draw:id="Slide-298">
        <draw:custom-shape svg:x="0.82in" svg:y="0.35in" svg:width="7.65in" svg:height="0.42in" draw:id="id57" draw:style-name="a540" draw:name="Text 0">
          <svg:title/>
          <svg:desc/>
          <text:list text:style-name="a539">
            <text:list-item>
              <text:p text:style-name="a538" text:class-names="" text:cond-style-name=""><text:span text:style-name="a536" text:class-names="">Pipeline Overview</text:span><text:span text:style-name="a53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in" svg:y="0.31in" svg:width="0.12in" svg:height="0.52in" draw:id="id58" draw:style-name="a543" draw:name="Shape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9" draw:style-name="a547" draw:name="Espace réservé du numéro de diapositive 2" svg:x="6.48297in" svg:y="4.44039in" svg:width="0.3in" svg:height="0.2in">
          <draw:text-box>
            <text:p text:style-name="a546" text:class-names="" text:cond-style-name=""><text:span text:style-name="a544" text:class-names=""><text:page-number style:num-format="1" text:fixed="false"/></text:span><text:span text:style-name="a545" text:class-names=""/></text:p>
          </draw:text-box>
          <svg:title/>
          <svg:desc/>
        </draw:frame>
        <draw:frame draw:id="id60" draw:name="Table 8" svg:x="1.8414in" svg:y="1.52489in" svg:width="9.89258in" svg:height="4.44589in">
          <table:table table:style-name="a54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49" table:default-cell-style-name=""/>
            <table:table-column table:style-name="a550" table:default-cell-style-name=""/>
            <table:table-row table:style-name="a551" table:default-cell-style-name="">
              <table:table-cell table:style-name="a555">
                <text:list text:style-name="a554">
                  <text:list-item>
                    <text:p text:style-name="a553" text:class-names="" text:cond-style-name=""><text:span text:style-name="a552" text:class-names="">Stage</text:span></text:p>
                  </text:list-item>
                </text:list>
              </table:table-cell>
              <table:table-cell table:style-name="a559">
                <text:list text:style-name="a558">
                  <text:list-item>
                    <text:p text:style-name="a557" text:class-names="" text:cond-style-name=""><text:span text:style-name="a556" text:class-names="">Methond</text:span></text:p>
                  </text:list-item>
                </text:list>
              </table:table-cell>
            </table:table-row>
            <table:table-row table:style-name="a560" table:default-cell-style-name="">
              <table:table-cell table:style-name="a564">
                <text:list text:style-name="a563">
                  <text:list-item>
                    <text:p text:style-name="a562" text:class-names="" text:cond-style-name=""><text:span text:style-name="a561" text:class-names="">Input</text:span></text:p>
                  </text:list-item>
                </text:list>
              </table:table-cell>
              <table:table-cell table:style-name="a568">
                <text:list text:style-name="a567">
                  <text:list-item>
                    <text:p text:style-name="a566" text:class-names="" text:cond-style-name=""><text:span text:style-name="a565" text:class-names="">Stack Overflow question text</text:span></text:p>
                  </text:list-item>
                </text:list>
              </table:table-cell>
            </table:table-row>
            <table:table-row table:style-name="a569" table:default-cell-style-name="">
              <table:table-cell table:style-name="a573">
                <text:list text:style-name="a572">
                  <text:list-item>
                    <text:p text:style-name="a571" text:class-names="" text:cond-style-name=""><text:span text:style-name="a570" text:class-names="">Cleaning</text:span></text:p>
                  </text:list-item>
                </text:list>
              </table:table-cell>
              <table:table-cell table:style-name="a577">
                <text:list text:style-name="a576">
                  <text:list-item>
                    <text:p text:style-name="a575" text:class-names="" text:cond-style-name=""><text:span text:style-name="a574" text:class-names="">HTML/Code-aware preprocessing</text:span></text:p>
                  </text:list-item>
                </text:list>
              </table:table-cell>
            </table:table-row>
            <table:table-row table:style-name="a578" table:default-cell-style-name="">
              <table:table-cell table:style-name="a582">
                <text:list text:style-name="a581">
                  <text:list-item>
                    <text:p text:style-name="a580" text:class-names="" text:cond-style-name=""><text:span text:style-name="a579" text:class-names="">Features</text:span></text:p>
                  </text:list-item>
                </text:list>
              </table:table-cell>
              <table:table-cell table:style-name="a586">
                <text:list text:style-name="a585">
                  <text:list-item>
                    <text:p text:style-name="a584" text:class-names="" text:cond-style-name=""><text:span text:style-name="a583" text:class-names="">Hancrafted + sparse text features</text:span></text:p>
                  </text:list-item>
                </text:list>
              </table:table-cell>
            </table:table-row>
            <table:table-row table:style-name="a587" table:default-cell-style-name="">
              <table:table-cell table:style-name="a591">
                <text:list text:style-name="a590">
                  <text:list-item>
                    <text:p text:style-name="a589" text:class-names="" text:cond-style-name=""><text:span text:style-name="a588" text:class-names="">Vectorization</text:span></text:p>
                  </text:list-item>
                </text:list>
              </table:table-cell>
              <table:table-cell table:style-name="a595">
                <text:list text:style-name="a594">
                  <text:list-item>
                    <text:p text:style-name="a593" text:class-names="" text:cond-style-name=""><text:span text:style-name="a592" text:class-names="">Word TF-IDF, Character TF-IDF, One-Hot Encoding</text:span></text:p>
                  </text:list-item>
                </text:list>
              </table:table-cell>
            </table:table-row>
            <table:table-row table:style-name="a596" table:default-cell-style-name="">
              <table:table-cell table:style-name="a600">
                <text:list text:style-name="a599">
                  <text:list-item>
                    <text:p text:style-name="a598" text:class-names="" text:cond-style-name=""><text:span text:style-name="a597" text:class-names="">Base models</text:span></text:p>
                  </text:list-item>
                </text:list>
              </table:table-cell>
              <table:table-cell table:style-name="a604">
                <text:list text:style-name="a603">
                  <text:list-item>
                    <text:p text:style-name="a602" text:class-names="" text:cond-style-name=""><text:span text:style-name="a601" text:class-names="">SGD, Ridge, Logistic Regression</text:span></text:p>
                  </text:list-item>
                </text:list>
              </table:table-cell>
            </table:table-row>
            <table:table-row table:style-name="a605" table:default-cell-style-name="">
              <table:table-cell table:style-name="a609">
                <text:list text:style-name="a608">
                  <text:list-item>
                    <text:p text:style-name="a607" text:class-names="" text:cond-style-name=""><text:span text:style-name="a606" text:class-names="">Ensemble</text:span></text:p>
                  </text:list-item>
                </text:list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10" text:class-names="">Voting + Stacking</text:span></text:p>
                  </text:list-item>
                </text:list>
              </table:table-cell>
            </table:table-row>
            <table:table-row table:style-name="a614" table:default-cell-style-name="">
              <table:table-cell table:style-name="a618">
                <text:list text:style-name="a617">
                  <text:list-item>
                    <text:p text:style-name="a616" text:class-names="" text:cond-style-name=""><text:span text:style-name="a615" text:class-names="">Evaluation</text:span></text:p>
                  </text:list-item>
                </text:list>
              </table:table-cell>
              <table:table-cell table:style-name="a622">
                <text:list text:style-name="a621">
                  <text:list-item>
                    <text:p text:style-name="a620" text:class-names="" text:cond-style-name=""><text:span text:style-name="a619" text:class-names="">Accuracy, Micro-F1, Macro-F1, confusion-matrix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630">
          <draw:page-thumbnail draw:page-number="2" svg:x="0in" svg:y="0in" svg:width="0in" svg:height="0in" presentation:class="page" draw:id="id61" presentation:style-name="a623" draw:name="Slide Image Placeholder 1">
            <svg:title/>
            <svg:desc/>
          </draw:page-thumbnail>
          <draw:frame draw:id="id62" presentation:style-name="a626" draw:name="Notes Placeholder 2" svg:x="0in" svg:y="0in" svg:width="0in" svg:height="0in" presentation:class="notes" presentation:placeholder="false">
            <draw:text-box>
              <text:p text:style-name="a625" text:class-names="" text:cond-style-name=""><text:span text:style-name="a624" text:class-names="">[Sources] - VS Code Data Wrangler docs: https://code.visualstudio.com/docs/datascience/data-wrangler - Data Wrangler viewing-mode screenshot: https://code.visualstudio.com/assets/docs/datascience/data-wrangler/view-mode-ui.png - Uploaded README (EDA notebook, traffic/delay/airline/origin analyses).</text:span></text:p>
            </draw:text-box>
            <svg:title/>
            <svg:desc/>
          </draw:frame>
          <draw:frame draw:id="id63" draw:style-name="a629" draw:name="Slide Number Placeholder 3" svg:x="0in" svg:y="0in" svg:width="0in" svg:height="0in">
            <draw:text-box>
              <text:p text:style-name="a628" text:class-names="" text:cond-style-name=""><text:span text:style-name="a6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631" draw:master-page-name="Master1-Layout2-cust-MASTER" presentation:presentation-page-layout-name="Master1-PPL2" draw:id="Slide-285">
        <draw:custom-shape svg:x="0.82in" svg:y="0.35in" svg:width="7.65in" svg:height="0.42in" draw:id="id64" draw:style-name="a636" draw:name="Text 0">
          <svg:title/>
          <svg:desc/>
          <text:p text:style-name="a635" text:class-names="" text:cond-style-name=""><text:span text:style-name="a632" text:class-names="">2.<text:s text:c="1"/></text:span><text:span text:style-name="a633" text:class-names="">Preprocessing<text:s text:c="1"/></text:span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in" svg:y="0.31in" svg:width="0.12in" svg:height="0.52in" draw:id="id65" draw:style-name="a639" draw:name="Shape 3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645in" svg:y="0.81891in" svg:width="6.55in" svg:height="0.39982in" draw:id="id66" draw:style-name="a642" draw:name="Text 1">
          <svg:title/>
          <svg:desc/>
          <text:p text:style-name="a641" text:class-names="" text:cond-style-name=""><text:span text:style-name="a640" text:class-names="">Data quality &amp; Descriptive sta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802in" svg:y="1.27432in" svg:width="11.84in" svg:height="0in" draw:id="id67" draw:style-name="a645" draw:name="Shape 2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68" draw:style-name="a649" draw:name="Espace réservé du numéro de diapositive 2" svg:x="12.8in" svg:y="7.03in" svg:width="0.3in" svg:height="0.2in">
          <draw:text-box>
            <text:p text:style-name="a648" text:class-names="" text:cond-style-name=""><text:span text:style-name="a646" text:class-names=""><text:page-number style:num-format="1" text:fixed="false"/></text:span><text:span text:style-name="a647" text:class-names=""/></text:p>
          </draw:text-box>
          <svg:title/>
          <svg:desc/>
        </draw:frame>
        <draw:frame draw:id="id69" draw:style-name="a688" draw:name="TextBox 22" svg:x="0.92867in" svg:y="1.4027in" svg:width="8.03425in" svg:height="6.15957in">
          <draw:text-box>
            <text:p text:style-name="a652" text:class-names="" text:cond-style-name=""><text:span text:style-name="a650" text:class-names="">Methods:</text:span><text:span text:style-name="a651" text:class-names=""/></text:p>
            <text:p text:style-name="a654" text:class-names="" text:cond-style-name=""><text:span text:style-name="a653" text:class-names="">- Lowercasing and normalization</text:span></text:p>
            <text:p text:style-name="a656" text:class-names="" text:cond-style-name=""><text:span text:style-name="a655" text:class-names="">- HTML parsing with BeautifulSoup</text:span></text:p>
            <text:p text:style-name="a658" text:class-names="" text:cond-style-name=""><text:span text:style-name="a657" text:class-names="">- URL replacement</text:span></text:p>
            <text:p text:style-name="a660" text:class-names="" text:cond-style-name=""><text:span text:style-name="a659" text:class-names="">- Inline-code cleaning</text:span></text:p>
            <text:p text:style-name="a662" text:class-names="" text:cond-style-name=""><text:span text:style-name="a661" text:class-names="">- Code-block cleaning</text:span></text:p>
            <text:p text:style-name="a664" text:class-names="" text:cond-style-name=""><text:span text:style-name="a663" text:class-names="">- Stop-word removal</text:span></text:p>
            <text:p text:style-name="a666" text:class-names="" text:cond-style-name=""><text:span text:style-name="a665" text:class-names="">- Technical token preservation</text:span></text:p>
            <text:p text:style-name="a668" text:class-names="" text:cond-style-name=""><text:span text:style-name="a667" text:class-names=""/></text:p>
            <text:p text:style-name="a671" text:class-names="" text:cond-style-name=""><text:span text:style-name="a669" text:class-names="">Technical Token Preservation</text:span><text:span text:style-name="a670" text:class-names=""/></text:p>
            <text:p text:style-name="a675" text:class-names="" text:cond-style-name=""><text:span text:style-name="a672" text:class-names="">Tokens we want to keep:</text:span><text:span text:style-name="a673" text:class-names=""><text:line-break/></text:span><text:span text:style-name="a674" text:class-names="">Example:</text:span></text:p>
            <text:p text:style-name="a677" text:class-names="" text:cond-style-name=""><text:span text:style-name="a676" text:class-names="">- `c++`, `c#`, `.net`</text:span></text:p>
            <text:p text:style-name="a679" text:class-names="" text:cond-style-name=""><text:span text:style-name="a678" text:class-names="">- method-like tokens</text:span></text:p>
            <text:p text:style-name="a681" text:class-names="" text:cond-style-name=""><text:span text:style-name="a680" text:class-names="">- array types</text:span></text:p>
            <text:p text:style-name="a683" text:class-names="" text:cond-style-name=""><text:span text:style-name="a682" text:class-names="">- regex/code fragments</text:span></text:p>
            <text:p text:style-name="a685" text:class-names="" text:cond-style-name=""><text:span text:style-name="a684" text:class-names=""/></text:p>
            <text:p text:style-name="a687" text:class-names="" text:cond-style-name=""><text:span text:style-name="a686" text:class-names=""/></text:p>
          </draw:text-box>
          <svg:title/>
          <svg:desc/>
        </draw:frame>
        <presentation:notes draw:style-name="a696">
          <draw:page-thumbnail draw:page-number="3" svg:x="0in" svg:y="0in" svg:width="0in" svg:height="0in" presentation:class="page" draw:id="id70" presentation:style-name="a689" draw:name="Slide Image Placeholder 1">
            <svg:title/>
            <svg:desc/>
          </draw:page-thumbnail>
          <draw:frame draw:id="id71" presentation:style-name="a692" draw:name="Notes Placeholder 2" svg:x="0in" svg:y="0in" svg:width="0in" svg:height="0in" presentation:class="notes" presentation:placeholder="false">
            <draw:text-box>
              <text:p text:style-name="a691" text:class-names="" text:cond-style-name=""><text:span text:style-name="a690" text:class-names="">[Sources] - VS Code Data Wrangler docs: https://code.visualstudio.com/docs/datascience/data-wrangler - Data Wrangler viewing-mode screenshot: https://code.visualstudio.com/assets/docs/datascience/data-wrangler/view-mode-ui.png - Uploaded README (EDA notebook, traffic/delay/airline/origin analyses).</text:span></text:p>
            </draw:text-box>
            <svg:title/>
            <svg:desc/>
          </draw:frame>
          <draw:frame draw:id="id72" draw:style-name="a695" draw:name="Slide Number Placeholder 3" svg:x="0in" svg:y="0in" svg:width="0in" svg:height="0in">
            <draw:text-box>
              <text:p text:style-name="a694" text:class-names="" text:cond-style-name=""><text:span text:style-name="a6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697" draw:master-page-name="Master1-Layout2-cust-MASTER" presentation:presentation-page-layout-name="Master1-PPL2" draw:id="Slide-301">
        <draw:custom-shape svg:x="0.82in" svg:y="0.35in" svg:width="7.65in" svg:height="0.42in" draw:id="id73" draw:style-name="a702" draw:name="Text 0">
          <svg:title/>
          <svg:desc/>
          <text:p text:style-name="a701" text:class-names="" text:cond-style-name=""><text:span text:style-name="a698" text:class-names="">2.<text:s text:c="1"/></text:span><text:span text:style-name="a699" text:class-names="">Preprocessing<text:s text:c="1"/></text:span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in" svg:y="0.31in" svg:width="0.12in" svg:height="0.52in" draw:id="id74" draw:style-name="a705" draw:name="Shape 3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645in" svg:y="0.81891in" svg:width="6.55in" svg:height="0.39982in" draw:id="id75" draw:style-name="a708" draw:name="Text 1">
          <svg:title/>
          <svg:desc/>
          <text:p text:style-name="a707" text:class-names="" text:cond-style-name=""><text:span text:style-name="a706" text:class-names="">Data quality &amp; Descriptive sta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802in" svg:y="1.27432in" svg:width="11.84in" svg:height="0in" draw:id="id76" draw:style-name="a711" draw:name="Shape 2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715" draw:name="Espace réservé du numéro de diapositive 2" svg:x="12.8in" svg:y="7.03in" svg:width="0.3in" svg:height="0.2in">
          <draw:text-box>
            <text:p text:style-name="a714" text:class-names="" text:cond-style-name=""><text:span text:style-name="a712" text:class-names=""><text:page-number style:num-format="1" text:fixed="false"/></text:span><text:span text:style-name="a713" text:class-names=""/></text:p>
          </draw:text-box>
          <svg:title/>
          <svg:desc/>
        </draw:frame>
        <draw:frame draw:id="id78" draw:style-name="a733" draw:name="TextBox 22" svg:x="0.92867in" svg:y="1.4027in" svg:width="8.03425in" svg:height="4.47663in">
          <draw:text-box>
            <text:p text:style-name="a718" text:class-names="" text:cond-style-name=""><text:span text:style-name="a716" text:class-names="">Raw text :</text:span><text:span text:style-name="a717" text:class-names=""/></text:p>
            <text:p text:style-name="a720" text:class-names="" text:cond-style-name=""><text:span text:style-name="a719" text:class-names=""/></text:p>
            <text:p text:style-name="a723" text:class-names="" text:cond-style-name=""><text:span text:style-name="a721" text:class-names="">connection in .net  i got     &lt;blockquote&gt;    &lt;code&gt;system.data.datarow.datarow(system.data.datarowbuilder)&lt;/code&gt; is inaccessible due to its protection   level.  &lt;/blockquote&gt;   while connecting to sql-server. what does it mean</text:span><text:span text:style-name="a722" text:class-names=""/></text:p>
            <text:p text:style-name="a725" text:class-names="" text:cond-style-name=""><text:span text:style-name="a724" text:class-names=""/></text:p>
            <text:p text:style-name="a727" text:class-names="" text:cond-style-name=""><text:span text:style-name="a726" text:class-names="">Preprocessed text :</text:span></text:p>
            <text:p text:style-name="a729" text:class-names="" text:cond-style-name=""><text:span text:style-name="a728" text:class-names=""/></text:p>
            <text:p text:style-name="a732" text:class-names="" text:cond-style-name=""><text:span text:style-name="a730" text:class-names="">connection .net got quote_block system.data.datarow.datarow system.data.datarowbuilder inaccessible protection level connecting sql server does mean</text:span><text:span text:style-name="a731" text:class-names=""/></text:p>
          </draw:text-box>
          <svg:title/>
          <svg:desc/>
        </draw:frame>
        <presentation:notes draw:style-name="a742">
          <draw:page-thumbnail draw:page-number="4" svg:x="0in" svg:y="0in" svg:width="0in" svg:height="0in" presentation:class="page" draw:id="id79" presentation:style-name="a734" draw:name="Slide Image Placeholder 1">
            <svg:title/>
            <svg:desc/>
          </draw:page-thumbnail>
          <draw:frame draw:id="id80" presentation:style-name="a737" draw:name="Notes Placeholder 2" svg:x="0in" svg:y="0in" svg:width="0in" svg:height="0in" presentation:class="notes" presentation:placeholder="false">
            <draw:text-box>
              <text:p text:style-name="a736" text:class-names="" text:cond-style-name=""><text:span text:style-name="a735" text:class-names="">[Sources] - VS Code Data Wrangler docs: https://code.visualstudio.com/docs/datascience/data-wrangler - Data Wrangler viewing-mode screenshot: https://code.visualstudio.com/assets/docs/datascience/data-wrangler/view-mode-ui.png - Uploaded README (EDA notebook, traffic/delay/airline/origin analyses).</text:span></text:p>
            </draw:text-box>
            <svg:title/>
            <svg:desc/>
          </draw:frame>
          <draw:frame draw:id="id81" draw:style-name="a741" draw:name="Slide Number Placeholder 3" svg:x="0in" svg:y="0in" svg:width="0in" svg:height="0in">
            <draw:text-box>
  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  </draw:text-box>
            <svg:title/>
            <svg:desc/>
          </draw:frame>
        </presentation:notes>
      </draw:page>
      <draw:page draw:name="Slide41" draw:style-name="a743" draw:master-page-name="Master1-Layout2-cust-MASTER" presentation:presentation-page-layout-name="Master1-PPL2" draw:id="Slide-296">
        <draw:custom-shape svg:x="0.82in" svg:y="0.35in" svg:width="7.65in" svg:height="0.42in" draw:id="id82" draw:style-name="a747" draw:name="Text 0">
          <svg:title/>
          <svg:desc/>
          <text:p text:style-name="a746" text:class-names="" text:cond-style-name=""><text:span text:style-name="a744" text:class-names="">3. Train/Test Split</text:span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in" svg:y="0.31in" svg:width="0.12in" svg:height="0.52in" draw:id="id83" draw:style-name="a750" draw:name="Shape 3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753" draw:name="Slide Number Placeholder 0" svg:x="12.8in" svg:y="7.03in" svg:width="0.3in" svg:height="0.2in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  <draw:frame draw:id="id85" draw:style-name="a766" draw:name="TextBox 27" svg:x="0.6854in" svg:y="1.05506in" svg:width="4.44977in" svg:height="1.91855in">
          <draw:text-box>
            <text:p text:style-name="a756" text:class-names="" text:cond-style-name=""><text:span text:style-name="a754" text:class-names="">Splitting strategy</text:span><text:span text:style-name="a755" text:class-names=""/></text:p>
            <text:p text:style-name="a758" text:class-names="" text:cond-style-name=""><text:span text:style-name="a757" text:class-names=""/></text:p>
            <text:p text:style-name="a760" text:class-names="" text:cond-style-name=""><text:span text:style-name="a759" text:class-names="">- Stratified and balanced by class</text:span></text:p>
            <text:p text:style-name="a762" text:class-names="" text:cond-style-name=""><text:span text:style-name="a761" text:class-names="">- Same number of samples per label</text:span></text:p>
            <text:p text:style-name="a765" text:class-names="" text:cond-style-name=""><text:span text:style-name="a763" text:class-names="">- Fixed random seed</text:span><text:span text:style-name="a764" text:class-names=""/></text:p>
          </draw:text-box>
          <svg:title/>
          <svg:desc/>
        </draw:frame>
        <draw:frame draw:id="id86" draw:name="Table 28" svg:x="1.33562in" svg:y="3.25342in" svg:width="10.66518in" svg:height="2.53248in">
          <table:table table:style-name="a76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68" table:default-cell-style-name=""/>
            <table:table-column table:style-name="a769" table:default-cell-style-name=""/>
            <table:table-row table:style-name="a770" table:default-cell-style-name="">
              <table:table-cell table:style-name="a774">
                <text:list text:style-name="a773">
                  <text:list-item>
                    <text:p text:style-name="a772" text:class-names="" text:cond-style-name=""><text:span text:style-name="a771" text:class-names="">Setting</text:span></text:p>
                  </text:list-item>
                </text:list>
              </table:table-cell>
              <table:table-cell table:style-name="a778">
                <text:list text:style-name="a777">
                  <text:list-item>
                    <text:p text:style-name="a776" text:class-names="" text:cond-style-name=""><text:span text:style-name="a775" text:class-names="">Value</text:span></text:p>
                  </text:list-item>
                </text:list>
              </table:table-cell>
            </table:table-row>
            <table:table-row table:style-name="a779" table:default-cell-style-name="">
              <table:table-cell table:style-name="a783">
                <text:list text:style-name="a782">
                  <text:list-item>
                    <text:p text:style-name="a781" text:class-names="" text:cond-style-name=""><text:span text:style-name="a780" text:class-names="">Random seed</text:span></text:p>
                  </text:list-item>
                </text:list>
              </table:table-cell>
              <table:table-cell table:style-name="a787">
                <text:list text:style-name="a786">
                  <text:list-item>
                    <text:p text:style-name="a785" text:class-names="" text:cond-style-name=""><text:span text:style-name="a784" text:class-names="">42</text:span></text:p>
                  </text:list-item>
                </text:list>
              </table:table-cell>
            </table:table-row>
            <table:table-row table:style-name="a788" table:default-cell-style-name="">
              <table:table-cell table:style-name="a792">
                <text:list text:style-name="a791">
                  <text:list-item>
                    <text:p text:style-name="a790" text:class-names="" text:cond-style-name=""><text:span text:style-name="a789" text:class-names="">Train per class</text:span></text:p>
                  </text:list-item>
                </text:list>
              </table:table-cell>
              <table:table-cell table:style-name="a796">
                <text:list text:style-name="a795">
                  <text:list-item>
                    <text:p text:style-name="a794" text:class-names="" text:cond-style-name=""><text:span text:style-name="a793" text:class-names="">1500 samples</text:span></text:p>
                  </text:list-item>
                </text:list>
              </table:table-cell>
            </table:table-row>
            <table:table-row table:style-name="a797" table:default-cell-style-name="">
              <table:table-cell table:style-name="a801">
                <text:list text:style-name="a800">
                  <text:list-item>
                    <text:p text:style-name="a799" text:class-names="" text:cond-style-name=""><text:span text:style-name="a798" text:class-names="">Test per class</text:span></text:p>
                  </text:list-item>
                </text:list>
              </table:table-cell>
              <table:table-cell table:style-name="a805">
                <text:list text:style-name="a804">
                  <text:list-item>
                    <text:p text:style-name="a803" text:class-names="" text:cond-style-name=""><text:span text:style-name="a802" text:class-names="">500 samples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813">
          <draw:page-thumbnail draw:page-number="5" svg:x="0in" svg:y="0in" svg:width="0in" svg:height="0in" presentation:class="page" draw:id="id87" presentation:style-name="a806" draw:name="Slide Image Placeholder 1">
            <svg:title/>
            <svg:desc/>
          </draw:page-thumbnail>
          <draw:frame draw:id="id88" presentation:style-name="a809" draw:name="Notes Placeholder 2" svg:x="0in" svg:y="0in" svg:width="0in" svg:height="0in" presentation:class="notes" presentation:placeholder="false">
            <draw:text-box>
              <text:p text:style-name="a808" text:class-names="" text:cond-style-name=""><text:span text:style-name="a807" text:class-names="">[Sources] - Uploaded project READMEs in this chat (README.pdf and README (1).pdf). - User requested this revised table of contents in chat.</text:span></text:p>
            </draw:text-box>
            <svg:title/>
            <svg:desc/>
          </draw:frame>
          <draw:frame draw:id="id89" draw:style-name="a812" draw:name="Slide Number Placeholder 3" svg:x="0in" svg:y="0in" svg:width="0in" svg:height="0in">
            <draw:text-box>
              <text:p text:style-name="a811" text:class-names="" text:cond-style-name=""><text:span text:style-name="a8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 3" draw:style-name="a814" draw:master-page-name="Master1-Layout2-cust-MASTER" presentation:presentation-page-layout-name="Master1-PPL2" draw:id="Slide-258">
        <draw:custom-shape svg:x="0.82in" svg:y="0.35in" svg:width="7.65in" svg:height="0.42in" draw:id="id90" draw:style-name="a820" draw:name="Text 0">
          <svg:title/>
          <svg:desc/>
          <text:p text:style-name="a819" text:class-names="" text:cond-style-name=""><text:span text:style-name="a815" text:class-names="">4</text:span><text:span text:style-name="a816" text:class-names="">.<text:s text:c="1"/></text:span><text:span text:style-name="a817" text:class-names="">Handcrafted Features</text:span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in" svg:y="0.31in" svg:width="0.12in" svg:height="0.52in" draw:id="id91" draw:style-name="a823" draw:name="Shape 3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827" draw:name="Espace réservé du numéro de diapositive 2" svg:x="12.8in" svg:y="7.03in" svg:width="0.3in" svg:height="0.2in">
          <draw:text-box>
            <text:p text:style-name="a826" text:class-names="" text:cond-style-name=""><text:span text:style-name="a824" text:class-names=""><text:page-number style:num-format="1" text:fixed="false"/></text:span><text:span text:style-name="a825" text:class-names=""/></text:p>
          </draw:text-box>
          <svg:title/>
          <svg:desc/>
        </draw:frame>
        <draw:frame draw:id="id93" draw:style-name="a879" draw:name="TextBox 5" svg:x="0.82364in" svg:y="1.87984in" svg:width="6.06589in" svg:height="4.64843in">
          <draw:text-box>
            <text:p text:style-name="a829" text:class-names="" text:cond-style-name=""><text:span text:style-name="a828" text:class-names="">Automatic discovery:</text:span></text:p>
            <text:list text:style-name="a832">
              <text:list-item>
                <text:p text:style-name="a831" text:class-names="" text:cond-style-name=""><text:span text:style-name="a830" text:class-names="">Search pattern based on tokens :</text:span></text:p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Generic words (ex: python)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Identifiers (ex: @decorator)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Sequences of brackets, etc...</text:span></text:p>
                  </text:list-item>
                </text:list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Variable 1 to 3 grams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Keep on constraint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  <text:p text:style-name="a852" text:class-names="" text:cond-style-name=""><text:span text:style-name="a851" text:class-names="">Manual features:</text:span></text:p>
            <text:list text:style-name="a855">
              <text:list-item>
                <text:p text:style-name="a854" text:class-names="" text:cond-style-name=""><text:span text:style-name="a853" text:class-names="">Patterns specific to a language</text:span></text:p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Ex : std:: for C++</text:span></text:p>
                  </text:list-item>
                </text:list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Post metadata (ex: post length)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Keep on constraint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p text:style-name="a869" text:class-names="" text:cond-style-name=""><text:span text:style-name="a868" text:class-names="">Added One-Hot encoding:</text:span></text:p>
            <text:list text:style-name="a872">
              <text:list-item>
                <text:p text:style-name="a871" text:class-names="" text:cond-style-name=""><text:span text:style-name="a870" text:class-names="">Auto + Manual features only cover 23250 posts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  <draw:frame draw:id="id94" draw:name="Table 28" svg:x="6.97515in" svg:y="1.87745in" svg:width="5.68792in" svg:height="1.89936in">
          <table:table table:style-name="a88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81" table:default-cell-style-name=""/>
            <table:table-column table:style-name="a882" table:default-cell-style-name=""/>
            <table:table-row table:style-name="a883" table:default-cell-style-name="">
              <table:table-cell table:style-name="a887">
                <text:list text:style-name="a886">
                  <text:list-item>
                    <text:p text:style-name="a885" text:class-names="" text:cond-style-name=""><text:span text:style-name="a884" text:class-names="">Constraint</text:span></text:p>
                  </text:list-item>
                </text:list>
              </table:table-cell>
              <table:table-cell table:style-name="a891">
                <text:list text:style-name="a890">
                  <text:list-item>
                    <text:p text:style-name="a889" text:class-names="" text:cond-style-name=""><text:span text:style-name="a888" text:class-names="">Value</text:span></text:p>
                  </text:list-item>
                </text:list>
              </table:table-cell>
            </table:table-row>
            <table:table-row table:style-name="a892" table:default-cell-style-name=""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>Coverage</text:span></text:p>
                  </text:list-item>
                </text:list>
              </table:table-cell>
              <table:table-cell table:style-name="a900">
                <text:list text:style-name="a899">
                  <text:list-item>
                    <text:p text:style-name="a898" text:class-names="" text:cond-style-name=""><text:span text:style-name="a897" text:class-names="">&gt;= 200 posts</text:span></text:p>
                  </text:list-item>
                </text:list>
              </table:table-cell>
            </table:table-row>
            <table:table-row table:style-name="a901" table:default-cell-style-name=""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>Accuracy</text:span></text:p>
                  </text:list-item>
                </text:list>
              </table:table-cell>
              <table:table-cell table:style-name="a908">
                <text:p text:style-name="a907" text:class-names="" text:cond-style-name=""><text:span text:style-name="a906" text:class-names="">&gt;= 60%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5" draw:name="Table 28" svg:x="6.97515in" svg:y="3.77668in" svg:width="5.68792in" svg:height="1.89936in">
          <table:table table:style-name="a90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10" table:default-cell-style-name=""/>
            <table:table-column table:style-name="a911" table:default-cell-style-name=""/>
            <table:table-row table:style-name="a912" table:default-cell-style-name="">
              <table:table-cell table:style-name="a915">
                <text:p text:style-name="a914" text:class-names="" text:cond-style-name=""><text:span text:style-name="a913" text:class-names="">Type</text:span></text:p>
              </table:table-cell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>Amount</text:span></text:p>
                  </text:list-item>
                </text:list>
              </table:table-cell>
            </table:table-row>
            <table:table-row table:style-name="a920" table:default-cell-style-name=""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>Auto Discovered</text:span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>146 features</text:span></text:p>
                  </text:list-item>
                </text:list>
              </table:table-cell>
            </table:table-row>
            <table:table-row table:style-name="a929" table:default-cell-style-name=""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>Manual</text:span></text:p>
                  </text:list-item>
                </text:list>
              </table:table-cell>
              <table:table-cell table:style-name="a936">
                <text:p text:style-name="a935" text:class-names="" text:cond-style-name=""><text:span text:style-name="a934" text:class-names="">34 features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944">
          <draw:page-thumbnail draw:page-number="6" svg:x="0in" svg:y="0in" svg:width="0in" svg:height="0in" presentation:class="page" draw:id="id96" presentation:style-name="a937" draw:name="Slide Image Placeholder 1">
            <svg:title/>
            <svg:desc/>
          </draw:page-thumbnail>
          <draw:frame draw:id="id97" presentation:style-name="a940" draw:name="Notes Placeholder 2" svg:x="0in" svg:y="0in" svg:width="0in" svg:height="0in" presentation:class="notes" presentation:placeholder="false">
            <draw:text-box>
              <text:p text:style-name="a939" text:class-names="" text:cond-style-name=""><text:span text:style-name="a938" text:class-names="">[Sources] - VS Code Data Wrangler docs: https://code.visualstudio.com/docs/datascience/data-wrangler - Data Wrangler viewing-mode screenshot: https://code.visualstudio.com/assets/docs/datascience/data-wrangler/view-mode-ui.png - Uploaded README (EDA notebook, traffic/delay/airline/origin analyses).</text:span></text:p>
            </draw:text-box>
            <svg:title/>
            <svg:desc/>
          </draw:frame>
          <draw:frame draw:id="id98" draw:style-name="a943" draw:name="Slide Number Placeholder 3" svg:x="0in" svg:y="0in" svg:width="0in" svg:height="0in">
            <draw:text-box>
              <text:p text:style-name="a942" text:class-names="" text:cond-style-name=""><text:span text:style-name="a9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945" draw:master-page-name="Master1-Layout2-cust-MASTER" presentation:presentation-page-layout-name="Master1-PPL2" draw:id="Slide-273">
        <draw:custom-shape svg:x="0.82in" svg:y="0.35in" svg:width="7.65in" svg:height="0.42in" draw:id="id99" draw:style-name="a951" draw:name="Text 0">
          <svg:title/>
          <svg:desc/>
          <text:p text:style-name="a950" text:class-names="" text:cond-style-name=""><text:span text:style-name="a946" text:class-names="">5</text:span><text:span text:style-name="a947" text:class-names="">.<text:s text:c="1"/></text:span><text:span text:style-name="a948" text:class-names="">Vectorization Strategy</text:span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in" svg:y="0.31in" svg:width="0.12in" svg:height="0.52in" draw:id="id100" draw:style-name="a954" draw:name="Shape 3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958" draw:name="Espace réservé du numéro de diapositive 3" svg:x="12.8in" svg:y="7.03in" svg:width="0.3in" svg:height="0.2in">
          <draw:text-box>
            <text:p text:style-name="a957" text:class-names="" text:cond-style-name=""><text:span text:style-name="a955" text:class-names=""><text:page-number style:num-format="1" text:fixed="false"/></text:span><text:span text:style-name="a956" text:class-names=""/></text:p>
          </draw:text-box>
          <svg:title/>
          <svg:desc/>
        </draw:frame>
        <draw:frame draw:id="id102" draw:name="Table 10" svg:x="1.59499in" svg:y="2.73337in" svg:width="10.14409in" svg:height="2.5843in">
          <table:table table:style-name="a95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60" table:default-cell-style-name=""/>
            <table:table-column table:style-name="a961" table:default-cell-style-name=""/>
            <table:table-column table:style-name="a962" table:default-cell-style-name=""/>
            <table:table-row table:style-name="a963" table:default-cell-style-name=""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Vectorization</text:span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>Level</text:span></text:p>
                  </text:list-item>
                </text:list>
              </table:table-cell>
              <table:table-cell table:style-name="a975">
                <text:list text:style-name="a974">
                  <text:list-item>
                    <text:p text:style-name="a973" text:class-names="" text:cond-style-name=""><text:span text:style-name="a972" text:class-names="">Purpose</text:span></text:p>
                  </text:list-item>
                </text:list>
              </table:table-cell>
            </table:table-row>
            <table:table-row table:style-name="a976" table:default-cell-style-name=""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>Count</text:span></text:p>
                  </text:list-item>
                </text:list>
              </table:table-cell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>Word</text:span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5" text:class-names="">Raw term frequency baseline</text:span></text:p>
                  </text:list-item>
                </text:list>
              </table:table-cell>
            </table:table-row>
            <table:table-row table:style-name="a989" table:default-cell-style-name=""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>One-Hot</text:span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4" text:class-names="">Word</text:span></text:p>
                  </text:list-item>
                </text:list>
              </table:table-cell>
              <table:table-cell table:style-name="a1001">
                <text:list text:style-name="a1000">
                  <text:list-item>
                    <text:p text:style-name="a999" text:class-names="" text:cond-style-name=""><text:span text:style-name="a998" text:class-names="">Binary presence baseline</text:span></text:p>
                  </text:list-item>
                </text:list>
              </table:table-cell>
            </table:table-row>
            <table:table-row table:style-name="a1002" table:default-cell-style-name=""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>TF-IDF</text:span></text:p>
                  </text:list-item>
                </text:list>
              </table:table-cell>
              <table:table-cell table:style-name="a1010">
                <text:list text:style-name="a1009">
                  <text:list-item>
                    <text:p text:style-name="a1008" text:class-names="" text:cond-style-name=""><text:span text:style-name="a1007" text:class-names="">Word</text:span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1" text:class-names="">Main semantic representation</text:span></text:p>
                  </text:list-item>
                </text:list>
              </table:table-cell>
            </table:table-row>
            <table:table-row table:style-name="a1015" table:default-cell-style-name=""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>Char TF-IDF</text:span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20" text:class-names="">Character</text:span></text:p>
                  </text:list-item>
                </text:list>
              </table:table-cell>
              <table:table-cell table:style-name="a1027">
                <text:list text:style-name="a1026">
                  <text:list-item>
                    <text:p text:style-name="a1025" text:class-names="" text:cond-style-name=""><text:span text:style-name="a1024" text:class-names="">Syntax/pattern representation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presentation:notes draw:style-name="a1035">
          <draw:page-thumbnail draw:page-number="7" svg:x="0in" svg:y="0in" svg:width="0in" svg:height="0in" presentation:class="page" draw:id="id103" presentation:style-name="a1028" draw:name="Slide Image Placeholder 1">
            <svg:title/>
            <svg:desc/>
          </draw:page-thumbnail>
          <draw:frame draw:id="id104" presentation:style-name="a1031" draw:name="Notes Placeholder 2" svg:x="0in" svg:y="0in" svg:width="0in" svg:height="0in" presentation:class="notes" presentation:placeholder="false">
            <draw:text-box>
              <text:p text:style-name="a1030" text:class-names="" text:cond-style-name=""><text:span text:style-name="a1029" text:class-names="">[Sources] - VS Code Data Wrangler docs: https://code.visualstudio.com/docs/datascience/data-wrangler - Data Wrangler viewing-mode screenshot: https://code.visualstudio.com/assets/docs/datascience/data-wrangler/view-mode-ui.png - Uploaded README (EDA notebook, traffic/delay/airline/origin analyses).</text:span></text:p>
            </draw:text-box>
            <svg:title/>
            <svg:desc/>
          </draw:frame>
          <draw:frame draw:id="id105" draw:style-name="a1034" draw:name="Slide Number Placeholder 3" svg:x="0in" svg:y="0in" svg:width="0in" svg:height="0in">
            <draw:text-box>
              <text:p text:style-name="a1033" text:class-names="" text:cond-style-name=""><text:span text:style-name="a10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1036" draw:master-page-name="Master1-Layout2-cust-MASTER" presentation:presentation-page-layout-name="Master1-PPL2" draw:id="Slide-300">
        <draw:custom-shape svg:x="0.82in" svg:y="0.35in" svg:width="7.65in" svg:height="0.42in" draw:id="id106" draw:style-name="a1042" draw:name="Text 0">
          <svg:title/>
          <svg:desc/>
          <text:p text:style-name="a1041" text:class-names="" text:cond-style-name=""><text:span text:style-name="a1037" text:class-names="">6</text:span><text:span text:style-name="a1038" text:class-names="">.<text:s text:c="1"/></text:span><text:span text:style-name="a1039" text:class-names=""><text:s text:c="1"/>Model 3 - Benchmarking </text:span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in" svg:y="0.31in" svg:width="0.12in" svg:height="0.52in" draw:id="id107" draw:style-name="a1045" draw:name="Shape 3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1049" draw:name="Espace réservé du numéro de diapositive 3" svg:x="12.8in" svg:y="7.03in" svg:width="0.3in" svg:height="0.2in">
          <draw:text-box>
            <text:p text:style-name="a1048" text:class-names="" text:cond-style-name=""><text:span text:style-name="a1046" text:class-names=""><text:page-number style:num-format="1" text:fixed="false"/></text:span><text:span text:style-name="a1047" text:class-names=""/></text:p>
          </draw:text-box>
          <svg:title/>
          <svg:desc/>
        </draw:frame>
        <draw:frame draw:id="id109" draw:style-name="a1050" draw:name="Picture 5" svg:x="6.44573in" svg:y="1.88267in" svg:width="6.30208in" svg:height="1.78125in" style:rel-width="scale" style:rel-height="scale">
          <draw:image xlink:href="media/image8.png" xlink:type="simple" xlink:show="embed" xlink:actuate="onLoad"/>
          <svg:title/>
          <svg:desc>A screenshot of a fitness app

AI-generated content may be incorrect.</svg:desc>
        </draw:frame>
        <draw:custom-shape svg:x="11.51895in" svg:y="2.66529in" svg:width="1.04186in" svg:height="0.48559in" draw:id="id110" draw:style-name="a1053" draw:name="Rectangle 6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1061" draw:name="TextBox 7" svg:x="0.61828in" svg:y="4.60125in" svg:width="6.66667in" svg:height="1.61563in">
          <draw:text-box>
            <text:p text:style-name="a1055" text:class-names="" text:cond-style-name=""><text:span text:style-name="a1054" text:class-names="">One-Hot encoding + Handcrafted features achieve better results.</text:span></text:p>
            <text:p text:style-name="a1057" text:class-names="" text:cond-style-name=""><text:span text:style-name="a1056" text:class-names=""/></text:p>
            <text:p text:style-name="a1060" text:class-names="" text:cond-style-name=""><text:span text:style-name="a1058" text:class-names="">Conclusion :<text:s text:c="1"/></text:span><text:span text:style-name="a1059" text:class-names="">One-Hot Encoding + Handcrafted features &amp; Logistic Regression are chosen for model 3</text:span></text:p>
          </draw:text-box>
          <svg:title/>
          <svg:desc/>
        </draw:frame>
        <draw:frame draw:id="id112" draw:style-name="a1065" draw:name="TextBox 8" svg:x="6.37993in" svg:y="1.22312in" svg:width="6.66667in" svg:height="0.50488in">
          <draw:text-box>
            <text:p text:style-name="a1064" text:class-names="" text:cond-style-name=""><text:span text:style-name="a1062" text:class-names="">Method Benchmarking (LR)</text:span><text:span text:style-name="a1063" text:class-names=""/></text:p>
          </draw:text-box>
          <svg:title/>
          <svg:desc/>
        </draw:frame>
        <draw:frame draw:id="id113" draw:style-name="a1068" draw:name="TextBox 9" svg:x="0.49283in" svg:y="1.22312in" svg:width="5.67204in" svg:height="0.50488in">
          <draw:text-box>
            <text:p text:style-name="a1067" text:class-names="" text:cond-style-name=""><text:span text:style-name="a1066" text:class-names="">Model selection</text:span></text:p>
          </draw:text-box>
          <svg:title/>
          <svg:desc/>
        </draw:frame>
        <draw:frame draw:id="id114" draw:style-name="a1079" draw:name="TextBox 10" svg:x="0.49283in" svg:y="1.8862in" svg:width="5.67204in" svg:height="1.61563in">
          <draw:text-box>
            <text:list text:style-name="a1071">
              <text:list-item>
                <text:p text:style-name="a1070" text:class-names="" text:cond-style-name=""><text:span text:style-name="a1069" text:class-names="">Logistic Regression : Took ~3.2 hours of parameter tuning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XGB Classifier : Could not finish</text:span></text:p>
              </text:list-item>
            </text:list>
            <text:p text:style-name="a1076" text:class-names="" text:cond-style-name=""><text:span text:style-name="a1075" text:class-names=""/></text:p>
            <text:p text:style-name="a1078" text:class-names="" text:cond-style-name=""><text:span text:style-name="a1077" text:class-names=""/></text:p>
          </draw:text-box>
          <svg:title/>
          <svg:desc/>
        </draw:frame>
        <presentation:notes draw:style-name="a1088">
          <draw:page-thumbnail draw:page-number="8" svg:x="0in" svg:y="0in" svg:width="0in" svg:height="0in" presentation:class="page" draw:id="id115" presentation:style-name="a1080" draw:name="Slide Image Placeholder 1">
            <svg:title/>
            <svg:desc/>
          </draw:page-thumbnail>
          <draw:frame draw:id="id116" presentation:style-name="a1083" draw:name="Notes Placeholder 2" svg:x="0in" svg:y="0in" svg:width="0in" svg:height="0in" presentation:class="notes" presentation:placeholder="false">
            <draw:text-box>
              <text:p text:style-name="a1082" text:class-names="" text:cond-style-name=""><text:span text:style-name="a1081" text:class-names="">[Sources] - VS Code Data Wrangler docs: https://code.visualstudio.com/docs/datascience/data-wrangler - Data Wrangler viewing-mode screenshot: https://code.visualstudio.com/assets/docs/datascience/data-wrangler/view-mode-ui.png - Uploaded README (EDA notebook, traffic/delay/airline/origin analyses).</text:span></text:p>
            </draw:text-box>
            <svg:title/>
            <svg:desc/>
          </draw:frame>
          <draw:frame draw:id="id117" draw:style-name="a1087" draw:name="Slide Number Placeholder 3" svg:x="0in" svg:y="0in" svg:width="0in" svg:height="0in">
            <draw:text-box>
              <text:p text:style-name="a1086" text:class-names="" text:cond-style-name=""><text:span text:style-name="a1084" text:class-names=""><text:page-number style:num-format="1" text:fixed="false"/></text:span><text:span text:style-name="a1085" text:class-names=""/></text:p>
            </draw:text-box>
            <svg:title/>
            <svg:desc/>
          </draw:frame>
        </presentation:notes>
      </draw:page>
      <draw:page draw:name="Slide47" draw:style-name="a1089" draw:master-page-name="Master1-Layout2-cust-MASTER" presentation:presentation-page-layout-name="Master1-PPL2" draw:id="Slide-302">
        <draw:custom-shape svg:x="0.82in" svg:y="0.35in" svg:width="7.65in" svg:height="0.42in" draw:id="id118" draw:style-name="a1095" draw:name="Text 0">
          <svg:title/>
          <svg:desc/>
          <text:p text:style-name="a1094" text:class-names="" text:cond-style-name=""><text:span text:style-name="a1090" text:class-names="">6</text:span><text:span text:style-name="a1091" text:class-names="">.<text:s text:c="1"/></text:span><text:span text:style-name="a1092" text:class-names=""><text:s text:c="1"/>Model 3 - Metrics</text:span><text:span text:style-name="a10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in" svg:y="0.31in" svg:width="0.12in" svg:height="0.52in" draw:id="id119" draw:style-name="a1098" draw:name="Shape 3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1102" draw:name="Espace réservé du numéro de diapositive 3" svg:x="12.8in" svg:y="7.03in" svg:width="0.3in" svg:height="0.2in">
          <draw:text-box>
            <text:p text:style-name="a1101" text:class-names="" text:cond-style-name=""><text:span text:style-name="a1099" text:class-names=""><text:page-number style:num-format="1" text:fixed="false"/></text:span><text:span text:style-name="a1100" text:class-names=""/></text:p>
          </draw:text-box>
          <svg:title/>
          <svg:desc/>
        </draw:frame>
        <draw:frame draw:id="id121" draw:style-name="a1107" draw:name="TextBox 9" svg:x="0.49283in" svg:y="1.22312in" svg:width="5.67204in" svg:height="0.50488in">
          <draw:text-box>
            <text:p text:style-name="a1106" text:class-names="" text:cond-style-name=""><text:span text:style-name="a1103" text:class-names="">Model<text:s text:c="1"/></text:span><text:span text:style-name="a1104" text:class-names="">performance</text:span><text:span text:style-name="a1105" text:class-names=""/></text:p>
          </draw:text-box>
          <svg:title/>
          <svg:desc/>
        </draw:frame>
        <draw:frame draw:id="id122" draw:style-name="a1108" draw:name="Picture 10" svg:x="0.81454in" svg:y="1.875in" svg:width="5.8161in" svg:height="4.52851in" style:rel-width="scale" style:rel-height="scale">
          <draw:image xlink:href="media/image9.png" xlink:type="simple" xlink:show="embed" xlink:actuate="onLoad"/>
          <svg:title/>
          <svg:desc/>
        </draw:frame>
        <draw:frame draw:id="id123" draw:style-name="a1128" draw:name="TextBox 6" svg:x="7.16846in" svg:y="1.86828in" svg:width="6.66667in" svg:height="1.61563in">
          <draw:text-box>
            <text:list text:style-name="a1113">
              <text:list-item>
                <text:p text:style-name="a1112" text:class-names="" text:cond-style-name=""><text:span text:style-name="a1109" text:class-names="">Misclassification mostl</text:span><text:span text:style-name="a1110" text:class-names="">y on similar tags</text:span><text:span text:style-name="a1111" text:class-names=""/></text:p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4" text:class-names="">Ex : SQL / MYSQL</text:span><text:span text:style-name="a1115" text:class-names=""/></text:p>
                  </text:list-item>
                </text:list>
              </text:list-item>
            </text:list>
            <text:list text:style-name="a1121">
              <text:list-item>
                <text:p text:style-name="a1120" text:class-names="" text:cond-style-name=""><text:span text:style-name="a1118" text:class-names="">More misclassification than model 1 &amp; 2</text:span><text:span text:style-name="a1119" text:class-names=""/></text:p>
              </text:list-item>
            </text:list>
            <text:list text:style-name="a1125">
              <text:list-item>
                <text:p text:style-name="a1124" text:class-names="" text:cond-style-name=""><text:span text:style-name="a1122" text:class-names="">Keep the same overall pattern</text:span><text:span text:style-name="a1123" text:class-names=""/></text:p>
              </text:list-item>
            </text:list>
            <text:p text:style-name="a1127" text:class-names="" text:cond-style-name=""><text:span text:style-name="a1126" text:class-names=""/></text:p>
          </draw:text-box>
          <svg:title/>
          <svg:desc/>
        </draw:frame>
        <presentation:notes draw:style-name="a1137">
          <draw:page-thumbnail draw:page-number="9" svg:x="0in" svg:y="0in" svg:width="0in" svg:height="0in" presentation:class="page" draw:id="id124" presentation:style-name="a1129" draw:name="Slide Image Placeholder 1">
            <svg:title/>
            <svg:desc/>
          </draw:page-thumbnail>
          <draw:frame draw:id="id125" presentation:style-name="a1132" draw:name="Notes Placeholder 2" svg:x="0in" svg:y="0in" svg:width="0in" svg:height="0in" presentation:class="notes" presentation:placeholder="false">
            <draw:text-box>
              <text:p text:style-name="a1131" text:class-names="" text:cond-style-name=""><text:span text:style-name="a1130" text:class-names="">[Sources] - VS Code Data Wrangler docs: https://code.visualstudio.com/docs/datascience/data-wrangler - Data Wrangler viewing-mode screenshot: https://code.visualstudio.com/assets/docs/datascience/data-wrangler/view-mode-ui.png - Uploaded README (EDA notebook, traffic/delay/airline/origin analyses).</text:span></text:p>
            </draw:text-box>
            <svg:title/>
            <svg:desc/>
          </draw:frame>
          <draw:frame draw:id="id126" draw:style-name="a1136" draw:name="Slide Number Placeholder 3" svg:x="0in" svg:y="0in" svg:width="0in" svg:height="0in">
            <draw:text-box>
              <text:p text:style-name="a1135" text:class-names="" text:cond-style-name=""><text:span text:style-name="a1133" text:class-names=""><text:page-number style:num-format="1" text:fixed="false"/></text:span><text:span text:style-name="a1134" text:class-names=""/></text:p>
            </draw:text-box>
            <svg:title/>
            <svg:desc/>
          </draw:frame>
        </presentation:notes>
      </draw:page>
      <draw:page draw:name="Slide42" draw:style-name="a1138" draw:master-page-name="Master1-Layout1-cust-DEFAULT" presentation:presentation-page-layout-name="Master1-PPL1" draw:id="Slide-297">
        <draw:custom-shape svg:x="0.00595in" svg:y="0.00595in" svg:width="7.89881in" svg:height="7.5in" draw:id="id127" draw:style-name="a1141" draw:name="Rectangle 27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in" svg:y="0in" svg:width="0in" svg:height="7.5in" draw:id="id128" draw:style-name="a1144" draw:name="Shape 1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8in" svg:y="2.25776in" svg:width="6.25in" svg:height="1.3in" draw:id="id129" draw:style-name="a1148" draw:name="Text 19">
          <svg:title/>
          <svg:desc/>
          <text:p text:style-name="a1147" text:class-names="" text:cond-style-name=""><text:span text:style-name="a1145" text:class-names="">THANK YOU</text:span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in" svg:y="3.02in" svg:width="3.4in" svg:height="0.26in" draw:id="id130" draw:style-name="a1151" draw:name="Text 20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1152" draw:name="Picture 25" svg:x="10.3178in" svg:y="0.64973in" svg:width="2.86765in" svg:height="0.73698in" style:rel-width="scale" style:rel-height="scale">
          <draw:image xlink:href="media/image1.jpeg" xlink:type="simple" xlink:show="embed" xlink:actuate="onLoad"/>
          <svg:title/>
          <svg:desc>A red and black logo

AI-generated content may be incorrect.</svg:desc>
        </draw:frame>
        <draw:frame draw:id="id132" draw:style-name="a1153" draw:name="Picture 26" svg:x="8.10539in" svg:y="0.27145in" svg:width="2.02555in" svg:height="1.11439in" style:rel-width="scale" style:rel-height="scale">
          <draw:image xlink:href="media/image2.png" xlink:type="simple" xlink:show="embed" xlink:actuate="onLoad"/>
          <svg:title/>
          <svg:desc>A blue text on a white background

AI-generated content may be incorrect.</svg:desc>
        </draw:frame>
        <draw:custom-shape svg:x="1.05451in" svg:y="6.79364in" svg:width="5.8in" svg:height="0.55in" draw:id="id133" draw:style-name="a1157" draw:name="Text 21">
          <svg:title/>
          <svg:desc/>
          <text:p text:style-name="a1156" text:class-names="" text:cond-style-name=""><text:span text:style-name="a1154" text:class-names="">MASTER MINDS – INSA LYON</text:span><text:span text:style-name="a1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65">
          <draw:page-thumbnail draw:page-number="10" svg:x="0in" svg:y="0in" svg:width="0in" svg:height="0in" presentation:class="page" draw:id="id134" presentation:style-name="a1158" draw:name="Slide Image Placeholder 1">
            <svg:title/>
            <svg:desc/>
          </draw:page-thumbnail>
          <draw:frame draw:id="id135" presentation:style-name="a1161" draw:name="Notes Placeholder 2" svg:x="0in" svg:y="0in" svg:width="0in" svg:height="0in" presentation:class="notes" presentation:placeholder="false">
            <draw:text-box>
              <text:p text:style-name="a1160" text:class-names="" text:cond-style-name=""><text:span text:style-name="a1159" text:class-names="">[Sources] - Uploaded project READMEs in this chat (README.pdf and README (1).pdf). - Deck structure updated from user-specified revised table of contents in chat.</text:span></text:p>
            </draw:text-box>
            <svg:title/>
            <svg:desc/>
          </draw:frame>
          <draw:frame draw:id="id136" draw:style-name="a1164" draw:name="Slide Number Placeholder 3" svg:x="0in" svg:y="0in" svg:width="0in" svg:height="0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EFAULT"/>
    <style:presentation-page-layout style:name="Master1-PPL2" style:display-name="MASTER">
      <presentation:placeholder presentation:object="page-number" svg:x="12.8in" svg:y="7.03in" svg:width="0.3in" svg:height="0.2in"/>
    </style:presentation-page-layout>
    <style:style style:family="table-cell" style:name="a453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54">
      <style:table-cell-properties/>
    </style:style>
    <style:style style:family="table-cell" style:name="a455">
      <style:table-cell-properties fo:background-color="#ccd2d8"/>
    </style:style>
    <style:style style:family="table-cell" style:name="a460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6">
      <style:table-cell-properties/>
    </style:style>
    <style:style style:family="table-cell" style:name="a461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7">
      <style:table-cell-properties fo:background-color="#ccd2d8"/>
    </style:style>
    <style:style style:family="graphic" style:name="Graphics"/>
    <style:style style:family="table-cell" style:name="a458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9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458" table:paragraph-style-name=""/>
      <table:last-row table:style-name="a459" table:paragraph-style-name=""/>
      <table:first-column table:style-name="a460" table:paragraph-style-name=""/>
      <table:last-column table:style-name="a461" table:paragraph-style-name=""/>
      <table:body table:style-name="a453" table:paragraph-style-name=""/>
      <table:even-rows table:style-name="a456" table:paragraph-style-name=""/>
      <table:odd-rows table:style-name="a457" table:paragraph-style-name=""/>
      <table:even-columns table:style-name="a454" table:paragraph-style-name=""/>
      <table:odd-columns table:style-name="a45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3.33333in" style:print-orientation="portrait" style:register-truth-ref-style-name=""/>
    </style:page-layout>
    <style:page-layout style:name="pageLayout3">
      <style:page-layout-properties fo:page-width="7.5in" fo:page-height="13.33333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solid" svg:stroke-width="0.01389in" svg:stroke-color="#000000" svg:stroke-opacity="100%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draw:fill="none" draw:stroke="solid" svg:stroke-width="0.01389in" svg:stroke-color="#000000" svg:stroke-opacity="100%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solid" svg:stroke-width="0.01389in" svg:stroke-color="#000000" svg:strok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solid" svg:stroke-width="0.01389in" svg:stroke-color="#000000" svg:stroke-opacity="100%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draw:fill="none" draw:stroke="solid" svg:stroke-width="0.01389in" svg:stroke-color="#000000" svg:stroke-opacity="100%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draw:fill="none" draw:stroke="solid" svg:stroke-width="0.01389in" svg:stroke-color="#000000" svg:stroke-opacity="100%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f5f7f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">
      <style:graphic-properties draw:fill="none" draw:stroke="solid" svg:stroke-width="0.01389in" svg:stroke-color="#000000" svg:stroke-opacity="100%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draw:fill="none" draw:stroke="solid" svg:stroke-width="0.01389in" svg:stroke-color="#000000" svg:stroke-opacity="100%"/>
    </style:style>
    <style:style style:family="graphic" style:name="a300">
      <style:graphic-properties fo:wrap-option="wrap" fo:padding-top="0.05in" fo:padding-bottom="0.05in" fo:padding-left="0.1in" fo:padding-right="0.1in" draw:textarea-vertical-align="top" draw:textarea-horizontal-align="left" draw:fill="solid" draw:fill-color="#f5f7fb" draw:opacity="100%" draw:stroke="solid" svg:stroke-width="0.01389in" svg:stroke-color="#f5f7fb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top" draw:textarea-horizontal-align="left" draw:fill="solid" draw:fill-color="#163b73" draw:opacity="100%" draw:stroke="solid" svg:stroke-width="0.01389in" svg:stroke-color="#163b73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6b7a9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Slide Number Placeholder 0" svg:x="12.8in" svg:y="7.03in" svg:width="0.3in" svg:height="0.2in" presentation:class="page-number" presentation:placeholder="false">
        <draw:text-box>
          <text:p text:style-name="a2" text:class-names="" text:cond-style-name=""><text:span text:style-name="a1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frame draw:id="id1" presentation:style-name="a6" draw:name="Header Placeholder 1" svg:x="0in" svg:y="0in" svg:width="3.25in" svg:height="0.6684in" presentation:class="header" presentation:placeholder="false">
          <draw:text-box>
            <text:p text:style-name="a5" text:class-names="" text:cond-style-name=""><text:span text:style-name="a4" text:class-names=""/></text:p>
          </draw:text-box>
          <svg:title/>
          <svg:desc/>
        </draw:frame>
        <draw:frame draw:id="id2" presentation:style-name="a10" draw:name="Date Placeholder 2" svg:x="4.24826in" svg:y="0in" svg:width="3.25in" svg:height="0.6684in" presentation:class="date-time" presentation:placeholder="false">
          <draw:text-box>
            <text:p text:style-name="a9" text:class-names="" text:cond-style-name=""><text:span text:style-name="a7" text:class-names=""><text:date text:fixed="false" style:data-style-name="a8">4/28/2026</text:date></text:span></text:p>
          </draw:text-box>
          <svg:title/>
          <svg:desc/>
        </draw:frame>
        <draw:page-thumbnail svg:x="-0.25in" svg:y="1.66667in" svg:width="8in" svg:height="4.5in" presentation:class="page" draw:id="id3" presentation:style-name="a11" draw:name="Slide Image Placeholder 3">
          <svg:title/>
          <svg:desc/>
        </draw:page-thumbnail>
        <draw:frame draw:id="id4" presentation:style-name="a26" draw:name="Notes Placeholder 4" svg:x="0.75in" svg:y="6.41667in" svg:width="6in" svg:height="5.25in" presentation:class="notes" presentation:placeholder="false">
          <draw:text-box>
            <text:p text:style-name="a13" text:class-names="" text:cond-style-name=""><text:span text:style-name="a12" text:class-names="">Click to edit Master text styles</text:span></text:p>
            <text:list text:style-name="a16">
              <text:list-item>
                <text:list text:style-name="a16">
                  <text:list-item>
                    <text:p text:style-name="a15" text:class-names="" text:cond-style-name=""><text:span text:style-name="a14" text:class-names="">Second level</text:span></text:p>
                  </text:list-item>
                </text:list>
              </text:list-item>
            </text:list>
            <text:list text:style-name="a19">
              <text:list-item>
                <text:list text:style-name="a19">
                  <text:list-item>
                    <text:list text:style-name="a19">
                      <text:list-item>
                        <text:p text:style-name="a18" text:class-names="" text:cond-style-name=""><text:span text:style-name="a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">
              <text:list-item>
                <text:list text:style-name="a22">
                  <text:list-item>
                    <text:list text:style-name="a22">
                      <text:list-item>
                        <text:list text:style-name="a22">
                          <text:list-item>
                            <text:p text:style-name="a21" text:class-names="" text:cond-style-name=""><text:span text:style-name="a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">
              <text:list-item>
                <text:list text:style-name="a25">
                  <text:list-item>
                    <text:list text:style-name="a25">
                      <text:list-item>
                        <text:list text:style-name="a25">
                          <text:list-item>
                            <text:list text:style-name="a25">
                              <text:list-item>
                                <text:p text:style-name="a24" text:class-names="" text:cond-style-name=""><text:span text:style-name="a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29" draw:name="Footer Placeholder 5" svg:x="0in" svg:y="12.66493in" svg:width="3.25in" svg:height="0.6684in" presentation:class="footer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6" presentation:style-name="a32" draw:name="Slide Number Placeholder 6" svg:x="4.24826in" svg:y="12.66493in" svg:width="3.25in" svg:height="0.6684in" presentation:class="page-number" presentation:placeholder="false">
          <draw:text-box>
            <text:p text:style-name="a31" text:class-names="" text:cond-style-name=""><text:span text:style-name="a30" text:class-names=""><text:page-number style:num-format="1" text:fixed="false"/></text:span></text:p>
          </draw:text-box>
          <svg:title/>
          <svg:desc/>
        </draw:frame>
        <draw:frame draw:id="id7" presentation:style-name="a35" draw:name="Header Placeholder 1" svg:x="0in" svg:y="0in" svg:width="3.25in" svg:height="0.668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9" draw:name="Date Placeholder 2" svg:x="4.24826in" svg:y="0in" svg:width="3.25in" svg:height="0.668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4/28/2026</text:date></text:span></text:p>
          </draw:text-box>
          <svg:title/>
          <svg:desc/>
        </draw:frame>
        <draw:page-thumbnail svg:x="-0.25in" svg:y="1.66667in" svg:width="8in" svg:height="4.5in" presentation:class="page" draw:id="id9" presentation:style-name="a40" draw:name="Slide Image Placeholder 3">
          <svg:title/>
          <svg:desc/>
        </draw:page-thumbnail>
        <draw:frame draw:id="id10" presentation:style-name="a55" draw:name="Notes Placeholder 4" svg:x="0.75in" svg:y="6.41667in" svg:width="6in" svg:height="5.2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8" draw:name="Footer Placeholder 5" svg:x="0in" svg:y="12.66493in" svg:width="3.25in" svg:height="0.668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Slide Number Placeholder 6" svg:x="4.24826in" svg:y="12.66493in" svg:width="3.25in" svg:height="0.668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  <draw:frame draw:id="id13" presentation:style-name="a64" draw:name="Header Placeholder 1" svg:x="0in" svg:y="0in" svg:width="3.25in" svg:height="0.6684in" presentation:class="head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4" presentation:style-name="a68" draw:name="Date Placeholder 2" svg:x="4.24826in" svg:y="0in" svg:width="3.25in" svg:height="0.6684in" presentation:class="date-time" presentation:placeholder="false">
          <draw:text-box>
            <text:p text:style-name="a67" text:class-names="" text:cond-style-name=""><text:span text:style-name="a65" text:class-names=""><text:date text:fixed="false" style:data-style-name="a66">4/28/2026</text:date></text:span></text:p>
          </draw:text-box>
          <svg:title/>
          <svg:desc/>
        </draw:frame>
        <draw:page-thumbnail svg:x="-0.25in" svg:y="1.66667in" svg:width="8in" svg:height="4.5in" presentation:class="page" draw:id="id15" presentation:style-name="a69" draw:name="Slide Image Placeholder 3">
          <svg:title/>
          <svg:desc/>
        </draw:page-thumbnail>
        <draw:frame draw:id="id16" presentation:style-name="a84" draw:name="Notes Placeholder 4" svg:x="0.75in" svg:y="6.41667in" svg:width="6in" svg:height="5.25in" presentation:class="notes" presentation:placeholder="false">
          <draw:text-box>
            <text:p text:style-name="a71" text:class-names="" text:cond-style-name=""><text:span text:style-name="a70" text:class-names="">Click to edit Master text styles</text:span></text:p>
            <text:list text:style-name="a74">
              <text:list-item>
                <text:list text:style-name="a74">
                  <text:list-item>
                    <text:p text:style-name="a73" text:class-names="" text:cond-style-name=""><text:span text:style-name="a72" text:class-names="">Second level</text:span></text:p>
                  </text:list-item>
                </text:list>
              </text:list-item>
            </text:list>
            <text:list text:style-name="a77">
              <text:list-item>
                <text:list text:style-name="a77">
                  <text:list-item>
                    <text:list text:style-name="a77">
                      <text:list-item>
                        <text:p text:style-name="a76" text:class-names="" text:cond-style-name=""><text:span text:style-name="a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">
              <text:list-item>
                <text:list text:style-name="a80">
                  <text:list-item>
                    <text:list text:style-name="a80">
                      <text:list-item>
                        <text:list text:style-name="a80">
                          <text:list-item>
                            <text:p text:style-name="a79" text:class-names="" text:cond-style-name=""><text:span text:style-name="a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87" draw:name="Footer Placeholder 5" svg:x="0in" svg:y="12.66493in" svg:width="3.25in" svg:height="0.6684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8" presentation:style-name="a90" draw:name="Slide Number Placeholder 6" svg:x="4.24826in" svg:y="12.66493in" svg:width="3.25in" svg:height="0.6684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  <draw:frame draw:id="id19" presentation:style-name="a93" draw:name="Header Placeholder 1" svg:x="0in" svg:y="0in" svg:width="3.25in" svg:height="0.668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20" presentation:style-name="a97" draw:name="Date Placeholder 2" svg:x="4.24826in" svg:y="0in" svg:width="3.25in" svg:height="0.668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4/28/2026</text:date></text:span></text:p>
          </draw:text-box>
          <svg:title/>
          <svg:desc/>
        </draw:frame>
        <draw:page-thumbnail svg:x="-0.25in" svg:y="1.66667in" svg:width="8in" svg:height="4.5in" presentation:class="page" draw:id="id21" presentation:style-name="a98" draw:name="Slide Image Placeholder 3">
          <svg:title/>
          <svg:desc/>
        </draw:page-thumbnail>
        <draw:frame draw:id="id22" presentation:style-name="a113" draw:name="Notes Placeholder 4" svg:x="0.75in" svg:y="6.41667in" svg:width="6in" svg:height="5.25in" presentation:class="notes" presentation:placeholder="false">
          <draw:text-box>
            <text:p text:style-name="a100" text:class-names="" text:cond-style-name=""><text:span text:style-name="a99" text:class-names="">Click to 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3" presentation:style-name="a116" draw:name="Footer Placeholder 5" svg:x="0in" svg:y="12.66493in" svg:width="3.25in" svg:height="0.668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24" presentation:style-name="a119" draw:name="Slide Number Placeholder 6" svg:x="4.24826in" svg:y="12.66493in" svg:width="3.25in" svg:height="0.668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  <draw:frame draw:id="id25" presentation:style-name="a122" draw:name="Header Placeholder 1" svg:x="0in" svg:y="0in" svg:width="3.25in" svg:height="0.6684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26" presentation:style-name="a126" draw:name="Date Placeholder 2" svg:x="4.24826in" svg:y="0in" svg:width="3.25in" svg:height="0.6684in" presentation:class="date-time" presentation:placeholder="false">
          <draw:text-box>
            <text:p text:style-name="a125" text:class-names="" text:cond-style-name=""><text:span text:style-name="a123" text:class-names=""><text:date text:fixed="false" style:data-style-name="a124"/></text:span></text:p>
          </draw:text-box>
          <svg:title/>
          <svg:desc/>
        </draw:frame>
        <draw:page-thumbnail svg:x="-0.25in" svg:y="1.66667in" svg:width="8in" svg:height="4.5in" presentation:class="page" draw:id="id27" presentation:style-name="a127" draw:name="Slide Image Placeholder 3">
          <svg:title/>
          <svg:desc/>
        </draw:page-thumbnail>
        <draw:frame draw:id="id28" presentation:style-name="a142" draw:name="Notes Placeholder 4" svg:x="0.75in" svg:y="6.41667in" svg:width="6in" svg:height="5.25in" presentation:class="notes" presentation:placeholder="false">
          <draw:text-box>
            <text:p text:style-name="a129" text:class-names="" text:cond-style-name=""><text:span text:style-name="a128" text:class-names="">Click to edit Master text styles</text:span></text:p>
            <text:list text:style-name="a132">
              <text:list-item>
                <text:list text:style-name="a132">
                  <text:list-item>
                    <text:p text:style-name="a131" text:class-names="" text:cond-style-name=""><text:span text:style-name="a130" text:class-names="">Second level</text:span></text:p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p text:style-name="a134" text:class-names="" text:cond-style-name=""><text:span text:style-name="a1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list text:style-name="a138">
                          <text:list-item>
                            <text:p text:style-name="a137" text:class-names="" text:cond-style-name=""><text:span text:style-name="a1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list text:style-name="a141">
                              <text:list-item>
                                <text:p text:style-name="a140" text:class-names="" text:cond-style-name=""><text:span text:style-name="a1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9" presentation:style-name="a145" draw:name="Footer Placeholder 5" svg:x="0in" svg:y="12.66493in" svg:width="3.25in" svg:height="0.6684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30" presentation:style-name="a148" draw:name="Slide Number Placeholder 6" svg:x="4.24826in" svg:y="12.66493in" svg:width="3.25in" svg:height="0.6684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DEFAULT" style:page-layout-name="pageLayout1" draw:style-name="a150">
      <presentation:notes style:page-layout-name="pageLayout2" draw:style-name="a296">
        <draw:frame draw:id="id1" presentation:style-name="a153" draw:name="Header Placeholder 1" svg:x="0in" svg:y="0in" svg:width="3.25in" svg:height="0.668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2" presentation:style-name="a157" draw:name="Date Placeholder 2" svg:x="4.24826in" svg:y="0in" svg:width="3.25in" svg:height="0.668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4/28/2026</text:date></text:span></text:p>
          </draw:text-box>
          <svg:title/>
          <svg:desc/>
        </draw:frame>
        <draw:page-thumbnail svg:x="-0.25in" svg:y="1.66667in" svg:width="8in" svg:height="4.5in" presentation:class="page" draw:id="id3" presentation:style-name="a158" draw:name="Slide Image Placeholder 3">
          <svg:title/>
          <svg:desc/>
        </draw:page-thumbnail>
        <draw:frame draw:id="id4" presentation:style-name="a173" draw:name="Notes Placeholder 4" svg:x="0.75in" svg:y="6.41667in" svg:width="6in" svg:height="5.2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176" draw:name="Footer Placeholder 5" svg:x="0in" svg:y="12.66493in" svg:width="3.25in" svg:height="0.668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6" presentation:style-name="a179" draw:name="Slide Number Placeholder 6" svg:x="4.24826in" svg:y="12.66493in" svg:width="3.25in" svg:height="0.6684in" presentation:class="page-number" presentation:placeholder="false">
          <draw:text-box>
            <text:p text:style-name="a178" text:class-names="" text:cond-style-name=""><text:span text:style-name="a177" text:class-names=""><text:page-number style:num-format="1" text:fixed="false"/></text:span></text:p>
          </draw:text-box>
          <svg:title/>
          <svg:desc/>
        </draw:frame>
        <draw:frame draw:id="id7" presentation:style-name="a182" draw:name="Header Placeholder 1" svg:x="0in" svg:y="0in" svg:width="3.25in" svg:height="0.6684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8" presentation:style-name="a186" draw:name="Date Placeholder 2" svg:x="4.24826in" svg:y="0in" svg:width="3.25in" svg:height="0.6684in" presentation:class="date-time" presentation:placeholder="false">
          <draw:text-box>
            <text:p text:style-name="a185" text:class-names="" text:cond-style-name=""><text:span text:style-name="a183" text:class-names=""><text:date text:fixed="false" style:data-style-name="a184">4/28/2026</text:date></text:span></text:p>
          </draw:text-box>
          <svg:title/>
          <svg:desc/>
        </draw:frame>
        <draw:page-thumbnail svg:x="-0.25in" svg:y="1.66667in" svg:width="8in" svg:height="4.5in" presentation:class="page" draw:id="id9" presentation:style-name="a187" draw:name="Slide Image Placeholder 3">
          <svg:title/>
          <svg:desc/>
        </draw:page-thumbnail>
        <draw:frame draw:id="id10" presentation:style-name="a202" draw:name="Notes Placeholder 4" svg:x="0.75in" svg:y="6.41667in" svg:width="6in" svg:height="5.25in" presentation:class="notes" presentation:placeholder="false">
          <draw:text-box>
            <text:p text:style-name="a189" text:class-names="" text:cond-style-name=""><text:span text:style-name="a188" text:class-names="">Click to edit Master text styles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cond le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05" draw:name="Footer Placeholder 5" svg:x="0in" svg:y="12.66493in" svg:width="3.25in" svg:height="0.6684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2" presentation:style-name="a208" draw:name="Slide Number Placeholder 6" svg:x="4.24826in" svg:y="12.66493in" svg:width="3.25in" svg:height="0.6684in" presentation:class="page-number" presentation:placeholder="false">
          <draw:text-box>
            <text:p text:style-name="a207" text:class-names="" text:cond-style-name=""><text:span text:style-name="a206" text:class-names=""><text:page-number style:num-format="1" text:fixed="false"/></text:span></text:p>
          </draw:text-box>
          <svg:title/>
          <svg:desc/>
        </draw:frame>
        <draw:frame draw:id="id13" presentation:style-name="a211" draw:name="Header Placeholder 1" svg:x="0in" svg:y="0in" svg:width="3.25in" svg:height="0.668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14" presentation:style-name="a215" draw:name="Date Placeholder 2" svg:x="4.24826in" svg:y="0in" svg:width="3.25in" svg:height="0.6684in" presentation:class="date-time" presentation:placeholder="false">
          <draw:text-box>
            <text:p text:style-name="a214" text:class-names="" text:cond-style-name=""><text:span text:style-name="a212" text:class-names=""><text:date text:fixed="false" style:data-style-name="a213">4/28/2026</text:date></text:span></text:p>
          </draw:text-box>
          <svg:title/>
          <svg:desc/>
        </draw:frame>
        <draw:page-thumbnail svg:x="-0.25in" svg:y="1.66667in" svg:width="8in" svg:height="4.5in" presentation:class="page" draw:id="id15" presentation:style-name="a216" draw:name="Slide Image Placeholder 3">
          <svg:title/>
          <svg:desc/>
        </draw:page-thumbnail>
        <draw:frame draw:id="id16" presentation:style-name="a231" draw:name="Notes Placeholder 4" svg:x="0.75in" svg:y="6.41667in" svg:width="6in" svg:height="5.25in" presentation:class="notes" presentation:placeholder="false">
          <draw:text-box>
            <text:p text:style-name="a218" text:class-names="" text:cond-style-name=""><text:span text:style-name="a217" text:class-names="">Click to edit Master text styles</text:span></text:p>
            <text:list text:style-name="a221">
              <text:list-item>
                <text:list text:style-name="a221">
                  <text:list-item>
                    <text:p text:style-name="a220" text:class-names="" text:cond-style-name=""><text:span text:style-name="a219" text:class-names="">Second level</text:span></text:p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p text:style-name="a223" text:class-names="" text:cond-style-name=""><text:span text:style-name="a2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p text:style-name="a226" text:class-names="" text:cond-style-name=""><text:span text:style-name="a2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list text:style-name="a230">
                              <text:list-item>
                                <text:p text:style-name="a229" text:class-names="" text:cond-style-name=""><text:span text:style-name="a2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234" draw:name="Footer Placeholder 5" svg:x="0in" svg:y="12.66493in" svg:width="3.25in" svg:height="0.6684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8" presentation:style-name="a237" draw:name="Slide Number Placeholder 6" svg:x="4.24826in" svg:y="12.66493in" svg:width="3.25in" svg:height="0.6684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  <draw:frame draw:id="id19" presentation:style-name="a240" draw:name="Header Placeholder 1" svg:x="0in" svg:y="0in" svg:width="3.25in" svg:height="0.6684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20" presentation:style-name="a244" draw:name="Date Placeholder 2" svg:x="4.24826in" svg:y="0in" svg:width="3.25in" svg:height="0.6684in" presentation:class="date-time" presentation:placeholder="false">
          <draw:text-box>
            <text:p text:style-name="a243" text:class-names="" text:cond-style-name=""><text:span text:style-name="a241" text:class-names=""><text:date text:fixed="false" style:data-style-name="a242">4/28/2026</text:date></text:span></text:p>
          </draw:text-box>
          <svg:title/>
          <svg:desc/>
        </draw:frame>
        <draw:page-thumbnail svg:x="-0.25in" svg:y="1.66667in" svg:width="8in" svg:height="4.5in" presentation:class="page" draw:id="id21" presentation:style-name="a245" draw:name="Slide Image Placeholder 3">
          <svg:title/>
          <svg:desc/>
        </draw:page-thumbnail>
        <draw:frame draw:id="id22" presentation:style-name="a260" draw:name="Notes Placeholder 4" svg:x="0.75in" svg:y="6.41667in" svg:width="6in" svg:height="5.25in" presentation:class="notes" presentation:placeholder="false">
          <draw:text-box>
            <text:p text:style-name="a247" text:class-names="" text:cond-style-name=""><text:span text:style-name="a246" text:class-names="">Click to edit Master text styles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Second level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list text:style-name="a259">
                              <text:list-item>
                                <text:p text:style-name="a258" text:class-names="" text:cond-style-name=""><text:span text:style-name="a2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3" presentation:style-name="a263" draw:name="Footer Placeholder 5" svg:x="0in" svg:y="12.66493in" svg:width="3.25in" svg:height="0.6684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24" presentation:style-name="a266" draw:name="Slide Number Placeholder 6" svg:x="4.24826in" svg:y="12.66493in" svg:width="3.25in" svg:height="0.6684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  <draw:frame draw:id="id25" presentation:style-name="a269" draw:name="Header Placeholder 1" svg:x="0in" svg:y="0in" svg:width="3.25in" svg:height="0.6684in" presentation:class="head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26" presentation:style-name="a273" draw:name="Date Placeholder 2" svg:x="4.24826in" svg:y="0in" svg:width="3.25in" svg:height="0.6684in" presentation:class="date-time" presentation:placeholder="false">
          <draw:text-box>
            <text:p text:style-name="a272" text:class-names="" text:cond-style-name=""><text:span text:style-name="a270" text:class-names=""><text:date text:fixed="false" style:data-style-name="a271"/></text:span></text:p>
          </draw:text-box>
          <svg:title/>
          <svg:desc/>
        </draw:frame>
        <draw:page-thumbnail svg:x="-0.25in" svg:y="1.66667in" svg:width="8in" svg:height="4.5in" presentation:class="page" draw:id="id27" presentation:style-name="a274" draw:name="Slide Image Placeholder 3">
          <svg:title/>
          <svg:desc/>
        </draw:page-thumbnail>
        <draw:frame draw:id="id28" presentation:style-name="a289" draw:name="Notes Placeholder 4" svg:x="0.75in" svg:y="6.41667in" svg:width="6in" svg:height="5.25in" presentation:class="notes" presentation:placeholder="false">
          <draw:text-box>
            <text:p text:style-name="a276" text:class-names="" text:cond-style-name=""><text:span text:style-name="a275" text:class-names="">Click to edit Master text styles</text:span></text:p>
            <text:list text:style-name="a279">
              <text:list-item>
                <text:list text:style-name="a279">
                  <text:list-item>
                    <text:p text:style-name="a278" text:class-names="" text:cond-style-name=""><text:span text:style-name="a277" text:class-names="">Second level</text:span></text:p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p text:style-name="a281" text:class-names="" text:cond-style-name=""><text:span text:style-name="a2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p text:style-name="a284" text:class-names="" text:cond-style-name=""><text:span text:style-name="a2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list text:style-name="a288">
                              <text:list-item>
                                <text:p text:style-name="a287" text:class-names="" text:cond-style-name=""><text:span text:style-name="a2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9" presentation:style-name="a292" draw:name="Footer Placeholder 5" svg:x="0in" svg:y="12.66493in" svg:width="3.25in" svg:height="0.6684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30" presentation:style-name="a295" draw:name="Slide Number Placeholder 6" svg:x="4.24826in" svg:y="12.66493in" svg:width="3.25in" svg:height="0.6684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MASTER" style:page-layout-name="pageLayout1" draw:style-name="a297">
      <draw:custom-shape svg:x="0in" svg:y="0in" svg:width="13.333in" svg:height="7.5in" draw:id="id31" draw:style-name="a300" draw:name="Shape 0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in" svg:height="0.12in" draw:id="id32" draw:style-name="a303" draw:name="Shape 1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306" draw:name="Slide Number Placeholder 0" svg:x="12.8in" svg:y="7.03in" svg:width="0.3in" svg:height="0.2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452">
        <draw:frame draw:id="id1" presentation:style-name="a309" draw:name="Header Placeholder 1" svg:x="0in" svg:y="0in" svg:width="3.25in" svg:height="0.6684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2" presentation:style-name="a313" draw:name="Date Placeholder 2" svg:x="4.24826in" svg:y="0in" svg:width="3.25in" svg:height="0.6684in" presentation:class="date-time" presentation:placeholder="false">
          <draw:text-box>
            <text:p text:style-name="a312" text:class-names="" text:cond-style-name=""><text:span text:style-name="a310" text:class-names=""><text:date text:fixed="false" style:data-style-name="a311">4/28/2026</text:date></text:span></text:p>
          </draw:text-box>
          <svg:title/>
          <svg:desc/>
        </draw:frame>
        <draw:page-thumbnail svg:x="-0.25in" svg:y="1.66667in" svg:width="8in" svg:height="4.5in" presentation:class="page" draw:id="id3" presentation:style-name="a314" draw:name="Slide Image Placeholder 3">
          <svg:title/>
          <svg:desc/>
        </draw:page-thumbnail>
        <draw:frame draw:id="id4" presentation:style-name="a329" draw:name="Notes Placeholder 4" svg:x="0.75in" svg:y="6.41667in" svg:width="6in" svg:height="5.25in" presentation:class="notes" presentation:placeholder="false">
          <draw:text-box>
            <text:p text:style-name="a316" text:class-names="" text:cond-style-name=""><text:span text:style-name="a315" text:class-names="">Click to edit Master text styles</text:span></text:p>
            <text:list text:style-name="a319">
              <text:list-item>
                <text:list text:style-name="a319">
                  <text:list-item>
                    <text:p text:style-name="a318" text:class-names="" text:cond-style-name=""><text:span text:style-name="a317" text:class-names="">Second level</text:span></text:p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p text:style-name="a321" text:class-names="" text:cond-style-name=""><text:span text:style-name="a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p text:style-name="a324" text:class-names="" text:cond-style-name=""><text:span text:style-name="a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list text:style-name="a328">
                              <text:list-item>
                                <text:p text:style-name="a327" text:class-names="" text:cond-style-name=""><text:span text:style-name="a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332" draw:name="Footer Placeholder 5" svg:x="0in" svg:y="12.66493in" svg:width="3.25in" svg:height="0.6684in" presentation:class="foot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6" presentation:style-name="a335" draw:name="Slide Number Placeholder 6" svg:x="4.24826in" svg:y="12.66493in" svg:width="3.25in" svg:height="0.6684in" presentation:class="page-number" presentation:placeholder="false">
          <draw:text-box>
            <text:p text:style-name="a334" text:class-names="" text:cond-style-name=""><text:span text:style-name="a333" text:class-names=""><text:page-number style:num-format="1" text:fixed="false"/></text:span></text:p>
          </draw:text-box>
          <svg:title/>
          <svg:desc/>
        </draw:frame>
        <draw:frame draw:id="id7" presentation:style-name="a338" draw:name="Header Placeholder 1" svg:x="0in" svg:y="0in" svg:width="3.25in" svg:height="0.6684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2" draw:name="Date Placeholder 2" svg:x="4.24826in" svg:y="0in" svg:width="3.25in" svg:height="0.6684in" presentation:class="date-time" presentation:placeholder="false">
          <draw:text-box>
            <text:p text:style-name="a341" text:class-names="" text:cond-style-name=""><text:span text:style-name="a339" text:class-names=""><text:date text:fixed="false" style:data-style-name="a340">4/28/2026</text:date></text:span></text:p>
          </draw:text-box>
          <svg:title/>
          <svg:desc/>
        </draw:frame>
        <draw:page-thumbnail svg:x="-0.25in" svg:y="1.66667in" svg:width="8in" svg:height="4.5in" presentation:class="page" draw:id="id9" presentation:style-name="a343" draw:name="Slide Image Placeholder 3">
          <svg:title/>
          <svg:desc/>
        </draw:page-thumbnail>
        <draw:frame draw:id="id10" presentation:style-name="a358" draw:name="Notes Placeholder 4" svg:x="0.75in" svg:y="6.41667in" svg:width="6in" svg:height="5.25in" presentation:class="notes" presentation:placeholder="false">
          <draw:text-box>
            <text:p text:style-name="a345" text:class-names="" text:cond-style-name=""><text:span text:style-name="a344" text:class-names="">Click to edit Master text styles</text:span></text:p>
            <text:list text:style-name="a348">
              <text:list-item>
                <text:list text:style-name="a348">
                  <text:list-item>
                    <text:p text:style-name="a347" text:class-names="" text:cond-style-name=""><text:span text:style-name="a346" text:class-names="">Second level</text:span></text:p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p text:style-name="a350" text:class-names="" text:cond-style-name=""><text:span text:style-name="a3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p text:style-name="a353" text:class-names="" text:cond-style-name=""><text:span text:style-name="a3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list text:style-name="a357">
                              <text:list-item>
                                <text:p text:style-name="a356" text:class-names="" text:cond-style-name=""><text:span text:style-name="a3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61" draw:name="Footer Placeholder 5" svg:x="0in" svg:y="12.66493in" svg:width="3.25in" svg:height="0.6684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2" presentation:style-name="a364" draw:name="Slide Number Placeholder 6" svg:x="4.24826in" svg:y="12.66493in" svg:width="3.25in" svg:height="0.6684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/></text:span></text:p>
          </draw:text-box>
          <svg:title/>
          <svg:desc/>
        </draw:frame>
        <draw:frame draw:id="id13" presentation:style-name="a367" draw:name="Header Placeholder 1" svg:x="0in" svg:y="0in" svg:width="3.25in" svg:height="0.6684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4" presentation:style-name="a371" draw:name="Date Placeholder 2" svg:x="4.24826in" svg:y="0in" svg:width="3.25in" svg:height="0.6684in" presentation:class="date-time" presentation:placeholder="false">
          <draw:text-box>
            <text:p text:style-name="a370" text:class-names="" text:cond-style-name=""><text:span text:style-name="a368" text:class-names=""><text:date text:fixed="false" style:data-style-name="a369">4/28/2026</text:date></text:span></text:p>
          </draw:text-box>
          <svg:title/>
          <svg:desc/>
        </draw:frame>
        <draw:page-thumbnail svg:x="-0.25in" svg:y="1.66667in" svg:width="8in" svg:height="4.5in" presentation:class="page" draw:id="id15" presentation:style-name="a372" draw:name="Slide Image Placeholder 3">
          <svg:title/>
          <svg:desc/>
        </draw:page-thumbnail>
        <draw:frame draw:id="id16" presentation:style-name="a387" draw:name="Notes Placeholder 4" svg:x="0.75in" svg:y="6.41667in" svg:width="6in" svg:height="5.25in" presentation:class="notes" presentation:placeholder="false">
          <draw:text-box>
            <text:p text:style-name="a374" text:class-names="" text:cond-style-name=""><text:span text:style-name="a373" text:class-names="">Click to edit Master text styles</text:span></text:p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Second level</text:span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p text:style-name="a379" text:class-names="" text:cond-style-name=""><text:span text:style-name="a3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p text:style-name="a382" text:class-names="" text:cond-style-name=""><text:span text:style-name="a3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list text:style-name="a386">
                              <text:list-item>
                                <text:p text:style-name="a385" text:class-names="" text:cond-style-name=""><text:span text:style-name="a3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390" draw:name="Footer Placeholder 5" svg:x="0in" svg:y="12.66493in" svg:width="3.25in" svg:height="0.6684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8" presentation:style-name="a393" draw:name="Slide Number Placeholder 6" svg:x="4.24826in" svg:y="12.66493in" svg:width="3.25in" svg:height="0.6684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  <draw:frame draw:id="id19" presentation:style-name="a396" draw:name="Header Placeholder 1" svg:x="0in" svg:y="0in" svg:width="3.25in" svg:height="0.6684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20" presentation:style-name="a400" draw:name="Date Placeholder 2" svg:x="4.24826in" svg:y="0in" svg:width="3.25in" svg:height="0.6684in" presentation:class="date-time" presentation:placeholder="false">
          <draw:text-box>
            <text:p text:style-name="a399" text:class-names="" text:cond-style-name=""><text:span text:style-name="a397" text:class-names=""><text:date text:fixed="false" style:data-style-name="a398">4/28/2026</text:date></text:span></text:p>
          </draw:text-box>
          <svg:title/>
          <svg:desc/>
        </draw:frame>
        <draw:page-thumbnail svg:x="-0.25in" svg:y="1.66667in" svg:width="8in" svg:height="4.5in" presentation:class="page" draw:id="id21" presentation:style-name="a401" draw:name="Slide Image Placeholder 3">
          <svg:title/>
          <svg:desc/>
        </draw:page-thumbnail>
        <draw:frame draw:id="id22" presentation:style-name="a416" draw:name="Notes Placeholder 4" svg:x="0.75in" svg:y="6.41667in" svg:width="6in" svg:height="5.25in" presentation:class="notes" presentation:placeholder="false">
          <draw:text-box>
            <text:p text:style-name="a403" text:class-names="" text:cond-style-name=""><text:span text:style-name="a402" text:class-names="">Click to edit Master text styles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Second level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3" presentation:style-name="a419" draw:name="Footer Placeholder 5" svg:x="0in" svg:y="12.66493in" svg:width="3.25in" svg:height="0.6684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24" presentation:style-name="a422" draw:name="Slide Number Placeholder 6" svg:x="4.24826in" svg:y="12.66493in" svg:width="3.25in" svg:height="0.6684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  <draw:frame draw:id="id25" presentation:style-name="a425" draw:name="Header Placeholder 1" svg:x="0in" svg:y="0in" svg:width="3.25in" svg:height="0.668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26" presentation:style-name="a429" draw:name="Date Placeholder 2" svg:x="4.24826in" svg:y="0in" svg:width="3.25in" svg:height="0.668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/></text:span></text:p>
          </draw:text-box>
          <svg:title/>
          <svg:desc/>
        </draw:frame>
        <draw:page-thumbnail svg:x="-0.25in" svg:y="1.66667in" svg:width="8in" svg:height="4.5in" presentation:class="page" draw:id="id27" presentation:style-name="a430" draw:name="Slide Image Placeholder 3">
          <svg:title/>
          <svg:desc/>
        </draw:page-thumbnail>
        <draw:frame draw:id="id28" presentation:style-name="a445" draw:name="Notes Placeholder 4" svg:x="0.75in" svg:y="6.41667in" svg:width="6in" svg:height="5.2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9" presentation:style-name="a448" draw:name="Footer Placeholder 5" svg:x="0in" svg:y="12.66493in" svg:width="3.25in" svg:height="0.668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30" presentation:style-name="a451" draw:name="Slide Number Placeholder 6" svg:x="4.24826in" svg:y="12.66493in" svg:width="3.25in" svg:height="0.668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assenger Movement Forecasting — Mid-Track Review</dc:title>
    <dc:subject>Mid-track presentation on passenger movement forecasting</dc:subject>
    <meta:initial-creator>OpenAI</meta:initial-creator>
    <meta:creation-date>2026-03-29T10:43:38Z</meta:creation-date>
    <dc:date>2026-04-28T11:24:12Z</dc:date>
    <meta:editing-cycles>7</meta:editing-cycles>
  </office:meta>
</office:document-meta>
</file>